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ettings.xml" manifest:media-type="text/xml"/>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Thumbnails/thumbnail.png" manifest:media-type="image/png"/>
  <manifest:file-entry manifest:full-path="content.xml" manifest:media-type="text/xml"/>
  <manifest:file-entry manifest:full-path="styles.xml" manifest:media-type="text/xml"/>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meta.xml" manifest:media-type="text/xml"/>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M Mono Slanted 10" svg:font-family="'LM Mono Slanted 10'"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note">
      <style:text-properties officeooo:rsid="005b45a8" officeooo:paragraph-rsid="005b45a8"/>
    </style:style>
    <style:style style:name="P2" style:family="paragraph" style:parent-style-name="Footnote">
      <style:text-properties officeooo:rsid="0070ed77" officeooo:paragraph-rsid="0073d9ef"/>
    </style:style>
    <style:style style:name="P3" style:family="paragraph" style:parent-style-name="Subtitle">
      <style:text-properties officeooo:rsid="00130ee5" officeooo:paragraph-rsid="00130ee5"/>
    </style:style>
    <style:style style:name="P4" style:family="paragraph" style:parent-style-name="Text_20_body">
      <style:text-properties officeooo:rsid="00130ee5" officeooo:paragraph-rsid="00130ee5"/>
    </style:style>
    <style:style style:name="P5" style:family="paragraph" style:parent-style-name="Text_20_body">
      <style:text-properties officeooo:rsid="001282b3" officeooo:paragraph-rsid="001282b3"/>
    </style:style>
    <style:style style:name="P6" style:family="paragraph" style:parent-style-name="Title">
      <style:text-properties officeooo:rsid="001282b3" officeooo:paragraph-rsid="001282b3"/>
    </style:style>
    <style:style style:name="P7" style:family="paragraph" style:parent-style-name="Text_20_body">
      <style:text-properties officeooo:rsid="001364e7" officeooo:paragraph-rsid="00431cd7"/>
    </style:style>
    <style:style style:name="P8" style:family="paragraph" style:parent-style-name="Text_20_body">
      <style:text-properties officeooo:rsid="001364e7" officeooo:paragraph-rsid="00487539"/>
    </style:style>
    <style:style style:name="P9" style:family="paragraph" style:parent-style-name="Text_20_body">
      <style:text-properties officeooo:rsid="00151e9e" officeooo:paragraph-rsid="0016f17f"/>
    </style:style>
    <style:style style:name="P10" style:family="paragraph" style:parent-style-name="Text_20_body">
      <style:text-properties officeooo:paragraph-rsid="001833cf"/>
    </style:style>
    <style:style style:name="P11" style:family="paragraph" style:parent-style-name="Text_20_body">
      <style:text-properties officeooo:rsid="0018ddee" officeooo:paragraph-rsid="0018ddee"/>
    </style:style>
    <style:style style:name="P12" style:family="paragraph" style:parent-style-name="Text_20_body">
      <style:text-properties officeooo:rsid="001afea9" officeooo:paragraph-rsid="00519c9a"/>
    </style:style>
    <style:style style:name="P13" style:family="paragraph" style:parent-style-name="Text_20_body">
      <style:text-properties officeooo:rsid="002194a7" officeooo:paragraph-rsid="002194a7"/>
    </style:style>
    <style:style style:name="P14" style:family="paragraph" style:parent-style-name="Text_20_body">
      <style:text-properties officeooo:paragraph-rsid="005a59d7"/>
    </style:style>
    <style:style style:name="P15" style:family="paragraph" style:parent-style-name="Text_20_body">
      <style:text-properties officeooo:paragraph-rsid="005a693f"/>
    </style:style>
    <style:style style:name="P16" style:family="paragraph" style:parent-style-name="Text_20_body">
      <style:text-properties officeooo:paragraph-rsid="005b45a8"/>
    </style:style>
    <style:style style:name="P17" style:family="paragraph" style:parent-style-name="Text_20_body">
      <style:text-properties officeooo:rsid="005e04f3" officeooo:paragraph-rsid="005e04f3"/>
    </style:style>
    <style:style style:name="P18" style:family="paragraph" style:parent-style-name="Text_20_body">
      <style:text-properties officeooo:rsid="006671dd" officeooo:paragraph-rsid="006be3fc"/>
    </style:style>
    <style:style style:name="P19" style:family="paragraph" style:parent-style-name="Text_20_body">
      <style:text-properties officeooo:paragraph-rsid="0076a7ef"/>
    </style:style>
    <style:style style:name="P20" style:family="paragraph" style:parent-style-name="Text_20_body">
      <style:text-properties officeooo:rsid="00784332" officeooo:paragraph-rsid="007a3171"/>
    </style:style>
    <style:style style:name="P21" style:family="paragraph" style:parent-style-name="Text_20_body">
      <style:text-properties officeooo:rsid="00784332" officeooo:paragraph-rsid="007f523c"/>
    </style:style>
    <style:style style:name="P22" style:family="paragraph" style:parent-style-name="Text_20_body">
      <style:text-properties officeooo:rsid="00784332" officeooo:paragraph-rsid="00983f3f"/>
    </style:style>
    <style:style style:name="P23" style:family="paragraph" style:parent-style-name="Footnote">
      <style:text-properties officeooo:rsid="0084000e" officeooo:paragraph-rsid="0084000e"/>
    </style:style>
    <style:style style:name="P24" style:family="paragraph" style:parent-style-name="Text_20_body">
      <style:text-properties fo:language="en" fo:country="US" officeooo:rsid="00519c9a" officeooo:paragraph-rsid="0052390a"/>
    </style:style>
    <style:style style:name="P25" style:family="paragraph" style:parent-style-name="Text_20_body">
      <style:text-properties fo:language="en" fo:country="US" officeooo:rsid="0045db7b" officeooo:paragraph-rsid="00abbaf9"/>
    </style:style>
    <style:style style:name="P26" style:family="paragraph" style:parent-style-name="Text_20_body">
      <style:text-properties fo:language="en" fo:country="US" officeooo:rsid="00abbaf9" officeooo:paragraph-rsid="00abbaf9"/>
    </style:style>
    <style:style style:name="P27" style:family="paragraph" style:parent-style-name="Text_20_body">
      <style:text-properties officeooo:rsid="007f523c" officeooo:paragraph-rsid="00970872"/>
    </style:style>
    <style:style style:name="P28" style:family="paragraph" style:parent-style-name="Text_20_body">
      <style:text-properties officeooo:rsid="007f523c" officeooo:paragraph-rsid="009e009c"/>
    </style:style>
    <style:style style:name="P29" style:family="paragraph" style:parent-style-name="Text_20_body">
      <style:text-properties officeooo:rsid="007f523c" officeooo:paragraph-rsid="00a670f0"/>
    </style:style>
    <style:style style:name="P30" style:family="paragraph" style:parent-style-name="Text_20_body">
      <style:text-properties officeooo:paragraph-rsid="008773f3"/>
    </style:style>
    <style:style style:name="P31" style:family="paragraph" style:parent-style-name="Text_20_body">
      <style:text-properties officeooo:paragraph-rsid="009a738c"/>
    </style:style>
    <style:style style:name="P32" style:family="paragraph" style:parent-style-name="Text_20_body">
      <style:text-properties officeooo:paragraph-rsid="00bd5110"/>
    </style:style>
    <style:style style:name="P33" style:family="paragraph" style:parent-style-name="Text_20_body">
      <style:text-properties officeooo:rsid="00bd5110" officeooo:paragraph-rsid="00bd5110"/>
    </style:style>
    <style:style style:name="P34" style:family="paragraph" style:parent-style-name="Footnote" style:list-style-name="L1">
      <style:text-properties officeooo:paragraph-rsid="001d88ce"/>
    </style:style>
    <style:style style:name="P35" style:family="paragraph" style:parent-style-name="Heading_20_1">
      <style:paragraph-properties fo:break-before="page"/>
    </style:style>
    <style:style style:name="P36" style:family="paragraph" style:parent-style-name="Heading_20_1">
      <style:paragraph-properties fo:break-before="page"/>
      <style:text-properties officeooo:paragraph-rsid="0052390a"/>
    </style:style>
    <style:style style:name="P37" style:family="paragraph" style:parent-style-name="Heading_20_2">
      <style:text-properties officeooo:paragraph-rsid="006be3fc"/>
    </style:style>
    <style:style style:name="P38" style:family="paragraph" style:parent-style-name="Heading_20_2">
      <style:paragraph-properties fo:keep-with-next="always"/>
      <style:text-properties style:font-name="Liberation Sans" officeooo:rsid="00a24bec" officeooo:paragraph-rsid="006be3fc" style:font-name-asian="Noto Sans CJK SC" style:font-name-complex="Noto Sans Devanagari1"/>
    </style:style>
    <style:style style:name="P39" style:family="paragraph" style:parent-style-name="Text_20_body" style:list-style-name="List_20_1">
      <style:text-properties officeooo:paragraph-rsid="009a738c"/>
    </style:style>
    <style:style style:name="P40" style:family="paragraph" style:parent-style-name="Text_20_body" style:list-style-name="List_20_1">
      <style:text-properties officeooo:paragraph-rsid="00991d40"/>
    </style:style>
    <style:style style:name="P41" style:family="paragraph" style:parent-style-name="Text_20_body" style:list-style-name="Numbering_20_abc">
      <style:text-properties officeooo:paragraph-rsid="00a9c9a3"/>
    </style:style>
    <style:style style:name="P42" style:family="paragraph" style:parent-style-name="Text_20_body" style:list-style-name="Numbering_20_abc">
      <style:text-properties officeooo:paragraph-rsid="00a67c2f"/>
    </style:style>
    <style:style style:name="P43" style:family="paragraph" style:parent-style-name="Text_20_body">
      <style:text-properties officeooo:rsid="001afea9" officeooo:paragraph-rsid="00cd4d96"/>
    </style:style>
    <style:style style:name="T1" style:family="text">
      <style:text-properties officeooo:rsid="00130ee5"/>
    </style:style>
    <style:style style:name="T2" style:family="text">
      <style:text-properties officeooo:rsid="001364e7"/>
    </style:style>
    <style:style style:name="T3" style:family="text">
      <style:text-properties fo:font-weight="bold" style:font-weight-asian="bold" style:font-weight-complex="bold"/>
    </style:style>
    <style:style style:name="T4" style:family="text">
      <style:text-properties fo:font-weight="bold" officeooo:rsid="0013c398" style:font-weight-asian="bold" style:font-weight-complex="bold"/>
    </style:style>
    <style:style style:name="T5" style:family="text">
      <style:text-properties fo:font-weight="bold" officeooo:rsid="002450b4" style:font-weight-asian="bold" style:font-weight-complex="bold"/>
    </style:style>
    <style:style style:name="T6" style:family="text">
      <style:text-properties fo:font-weight="bold" officeooo:rsid="003bf594" style:font-weight-asian="bold" style:font-weight-complex="bold"/>
    </style:style>
    <style:style style:name="T7" style:family="text">
      <style:text-properties fo:font-weight="bold" officeooo:rsid="0052e7bf" style:font-weight-asian="bold" style:font-weight-complex="bold"/>
    </style:style>
    <style:style style:name="T8" style:family="text">
      <style:text-properties fo:font-weight="bold" officeooo:rsid="00557ee1" style:font-weight-asian="bold" style:font-weight-complex="bold"/>
    </style:style>
    <style:style style:name="T9" style:family="text">
      <style:text-properties fo:font-weight="bold" officeooo:rsid="00572de4" style:font-weight-asian="bold" style:font-weight-complex="bold"/>
    </style:style>
    <style:style style:name="T10" style:family="text">
      <style:text-properties fo:font-weight="bold" officeooo:rsid="0059ddf5" style:font-weight-asian="bold" style:font-weight-complex="bold"/>
    </style:style>
    <style:style style:name="T11" style:family="text">
      <style:text-properties fo:font-weight="bold" officeooo:rsid="005a59d7" style:font-weight-asian="bold" style:font-weight-complex="bold"/>
    </style:style>
    <style:style style:name="T12" style:family="text">
      <style:text-properties fo:font-weight="bold" officeooo:rsid="005a693f" style:font-weight-asian="bold" style:font-weight-complex="bold"/>
    </style:style>
    <style:style style:name="T13" style:family="text">
      <style:text-properties fo:font-weight="bold" officeooo:rsid="005e04f3" style:font-weight-asian="bold" style:font-weight-complex="bold"/>
    </style:style>
    <style:style style:name="T14" style:family="text">
      <style:text-properties fo:font-weight="bold" officeooo:rsid="0061a43c" style:font-weight-asian="bold" style:font-weight-complex="bold"/>
    </style:style>
    <style:style style:name="T15" style:family="text">
      <style:text-properties fo:font-weight="bold" officeooo:rsid="006d80a9" style:font-weight-asian="bold" style:font-weight-complex="bold"/>
    </style:style>
    <style:style style:name="T16" style:family="text">
      <style:text-properties fo:font-weight="bold" officeooo:rsid="0070ed77" style:font-weight-asian="bold" style:font-weight-complex="bold"/>
    </style:style>
    <style:style style:name="T17" style:family="text">
      <style:text-properties fo:font-weight="bold" officeooo:rsid="0076a7ef" style:font-weight-asian="bold" style:font-weight-complex="bold"/>
    </style:style>
    <style:style style:name="T18" style:family="text">
      <style:text-properties fo:font-weight="bold" officeooo:rsid="007a3171" style:font-weight-asian="bold" style:font-weight-complex="bold"/>
    </style:style>
    <style:style style:name="T19" style:family="text">
      <style:text-properties fo:font-weight="bold" officeooo:rsid="0087f5e6" style:font-weight-asian="bold" style:font-weight-complex="bold"/>
    </style:style>
    <style:style style:name="T20" style:family="text">
      <style:text-properties fo:font-weight="bold" officeooo:rsid="0073d9ef" style:font-weight-asian="bold" style:font-weight-complex="bold"/>
    </style:style>
    <style:style style:name="T21" style:family="text">
      <style:text-properties fo:font-weight="bold" officeooo:rsid="0071cebf" style:font-weight-asian="bold" style:font-weight-complex="bold"/>
    </style:style>
    <style:style style:name="T22" style:family="text">
      <style:text-properties fo:font-weight="bold" officeooo:rsid="0074ec57" style:font-weight-asian="bold" style:font-weight-complex="bold"/>
    </style:style>
    <style:style style:name="T23" style:family="text">
      <style:text-properties fo:font-weight="bold" officeooo:rsid="00ab8e3f" style:font-weight-asian="bold" style:font-weight-complex="bold"/>
    </style:style>
    <style:style style:name="T24" style:family="text">
      <style:text-properties fo:font-weight="bold" officeooo:rsid="00abbaf9" style:font-weight-asian="bold" style:font-weight-complex="bold"/>
    </style:style>
    <style:style style:name="T25" style:family="text">
      <style:text-properties fo:font-style="italic" style:font-style-asian="italic" style:font-style-complex="italic"/>
    </style:style>
    <style:style style:name="T26" style:family="text">
      <style:text-properties fo:font-style="italic" officeooo:rsid="007a3171" style:font-style-asian="italic" style:font-style-complex="italic"/>
    </style:style>
    <style:style style:name="T27" style:family="text">
      <style:text-properties fo:font-style="italic" fo:font-weight="bold" style:font-style-asian="italic" style:font-weight-asian="bold" style:font-style-complex="italic" style:font-weight-complex="bold"/>
    </style:style>
    <style:style style:name="T28" style:family="text">
      <style:text-properties fo:font-style="italic" fo:font-weight="bold" officeooo:rsid="00160750" style:font-style-asian="italic" style:font-weight-asian="bold" style:font-style-complex="italic" style:font-weight-complex="bold"/>
    </style:style>
    <style:style style:name="T29" style:family="text">
      <style:text-properties fo:font-style="italic" fo:font-weight="bold" officeooo:rsid="00333e55" style:font-style-asian="italic" style:font-weight-asian="bold" style:font-style-complex="italic" style:font-weight-complex="bold"/>
    </style:style>
    <style:style style:name="T30" style:family="text">
      <style:text-properties fo:font-style="italic" fo:font-weight="bold" officeooo:rsid="0045153a" style:font-style-asian="italic" style:font-weight-asian="bold" style:font-style-complex="italic" style:font-weight-complex="bold"/>
    </style:style>
    <style:style style:name="T31" style:family="text">
      <style:text-properties fo:font-style="italic" fo:font-weight="bold" officeooo:rsid="00487539" style:font-style-asian="italic" style:font-weight-asian="bold" style:font-style-complex="italic" style:font-weight-complex="bold"/>
    </style:style>
    <style:style style:name="T32" style:family="text">
      <style:text-properties fo:font-style="italic" fo:font-weight="bold" officeooo:rsid="00499633" style:font-style-asian="italic" style:font-weight-asian="bold" style:font-style-complex="italic" style:font-weight-complex="bold"/>
    </style:style>
    <style:style style:name="T33" style:family="text">
      <style:text-properties fo:font-style="italic" fo:font-weight="bold" officeooo:rsid="00142116" style:font-style-asian="italic" style:font-weight-asian="bold" style:font-style-complex="italic" style:font-weight-complex="bold"/>
    </style:style>
    <style:style style:name="T34" style:family="text">
      <style:text-properties fo:font-style="italic" fo:font-weight="bold" officeooo:rsid="001833cf" style:font-style-asian="italic" style:font-weight-asian="bold" style:font-style-complex="italic" style:font-weight-complex="bold"/>
    </style:style>
    <style:style style:name="T35" style:family="text">
      <style:text-properties fo:font-style="italic" fo:font-weight="bold" officeooo:rsid="0052e7bf" style:font-style-asian="italic" style:font-weight-asian="bold" style:font-style-complex="italic" style:font-weight-complex="bold"/>
    </style:style>
    <style:style style:name="T36" style:family="text">
      <style:text-properties fo:font-style="italic" fo:font-weight="bold" officeooo:rsid="00557ee1" style:font-style-asian="italic" style:font-weight-asian="bold" style:font-style-complex="italic" style:font-weight-complex="bold"/>
    </style:style>
    <style:style style:name="T37" style:family="text">
      <style:text-properties fo:font-style="italic" fo:font-weight="bold" officeooo:rsid="00572de4" style:font-style-asian="italic" style:font-weight-asian="bold" style:font-style-complex="italic" style:font-weight-complex="bold"/>
    </style:style>
    <style:style style:name="T38" style:family="text">
      <style:text-properties fo:font-style="italic" fo:font-weight="bold" officeooo:rsid="0058f6ae" style:font-style-asian="italic" style:font-weight-asian="bold" style:font-style-complex="italic" style:font-weight-complex="bold"/>
    </style:style>
    <style:style style:name="T39" style:family="text">
      <style:text-properties fo:font-style="italic" fo:font-weight="bold" officeooo:rsid="005e04f3" style:font-style-asian="italic" style:font-weight-asian="bold" style:font-style-complex="italic" style:font-weight-complex="bold"/>
    </style:style>
    <style:style style:name="T40" style:family="text">
      <style:text-properties fo:font-style="italic" fo:font-weight="bold" officeooo:rsid="007a3171" style:font-style-asian="italic" style:font-weight-asian="bold" style:font-style-complex="italic" style:font-weight-complex="bold"/>
    </style:style>
    <style:style style:name="T41" style:family="text">
      <style:text-properties fo:font-style="italic" fo:font-weight="bold" officeooo:rsid="00ab8e3f" style:font-style-asian="italic" style:font-weight-asian="bold" style:font-style-complex="italic" style:font-weight-complex="bold"/>
    </style:style>
    <style:style style:name="T42" style:family="text">
      <style:text-properties fo:font-style="italic" fo:font-weight="bold" officeooo:rsid="00abbaf9" style:font-style-asian="italic" style:font-weight-asian="bold" style:font-style-complex="italic" style:font-weight-complex="bold"/>
    </style:style>
    <style:style style:name="T43" style:family="text">
      <style:text-properties fo:font-style="italic" fo:font-weight="bold" officeooo:rsid="00afe5cc" style:font-style-asian="italic" style:font-weight-asian="bold" style:font-style-complex="italic" style:font-weight-complex="bold"/>
    </style:style>
    <style:style style:name="T44" style:family="text">
      <style:text-properties fo:font-style="italic" fo:font-weight="bold" officeooo:rsid="00b1b759" style:font-style-asian="italic" style:font-weight-asian="bold" style:font-style-complex="italic" style:font-weight-complex="bold"/>
    </style:style>
    <style:style style:name="T45" style:family="text">
      <style:text-properties fo:font-style="italic" fo:font-weight="bold" officeooo:rsid="00c52e82" style:font-style-asian="italic" style:font-weight-asian="bold" style:font-style-complex="italic" style:font-weight-complex="bold"/>
    </style:style>
    <style:style style:name="T46" style:family="text">
      <style:text-properties fo:font-style="italic" fo:font-weight="normal" style:font-style-asian="italic" style:font-weight-asian="normal" style:font-style-complex="italic" style:font-weight-complex="normal"/>
    </style:style>
    <style:style style:name="T47" style:family="text">
      <style:text-properties fo:font-style="italic" fo:font-weight="normal" officeooo:rsid="00557ee1" style:font-style-asian="italic" style:font-weight-asian="normal" style:font-style-complex="italic" style:font-weight-complex="normal"/>
    </style:style>
    <style:style style:name="T48" style:family="text">
      <style:text-properties officeooo:rsid="0013c398"/>
    </style:style>
    <style:style style:name="T49" style:family="text">
      <style:text-properties officeooo:rsid="00142116"/>
    </style:style>
    <style:style style:name="T50" style:family="text">
      <style:text-properties officeooo:rsid="00160750"/>
    </style:style>
    <style:style style:name="T51" style:family="text">
      <style:text-properties officeooo:rsid="0016f17f"/>
    </style:style>
    <style:style style:name="T52" style:family="text">
      <style:text-properties officeooo:rsid="001833cf"/>
    </style:style>
    <style:style style:name="T53" style:family="text">
      <style:text-properties fo:language="en" fo:country="US"/>
    </style:style>
    <style:style style:name="T54" style:family="text">
      <style:text-properties fo:language="en" fo:country="US" officeooo:rsid="001833cf"/>
    </style:style>
    <style:style style:name="T55" style:family="text">
      <style:text-properties fo:language="en" fo:country="US" fo:font-style="italic" fo:font-weight="bold" style:font-style-asian="italic" style:font-weight-asian="bold" style:font-style-complex="italic" style:font-weight-complex="bold"/>
    </style:style>
    <style:style style:name="T56" style:family="text">
      <style:text-properties fo:language="en" fo:country="US" fo:font-style="italic" fo:font-weight="bold" officeooo:rsid="001d88ce" style:font-style-asian="italic" style:font-weight-asian="bold" style:font-style-complex="italic" style:font-weight-complex="bold"/>
    </style:style>
    <style:style style:name="T57" style:family="text">
      <style:text-properties fo:language="en" fo:country="US" fo:font-style="italic" fo:font-weight="bold" officeooo:rsid="002de403" style:font-style-asian="italic" style:font-weight-asian="bold" style:font-style-complex="italic" style:font-weight-complex="bold"/>
    </style:style>
    <style:style style:name="T58" style:family="text">
      <style:text-properties fo:language="en" fo:country="US" fo:font-style="italic" fo:font-weight="bold" officeooo:rsid="001afea9" style:font-style-asian="italic" style:font-weight-asian="bold" style:font-style-complex="italic" style:font-weight-complex="bold"/>
    </style:style>
    <style:style style:name="T59" style:family="text">
      <style:text-properties fo:language="en" fo:country="US" fo:font-style="italic" fo:font-weight="bold" officeooo:rsid="00812e2e" style:font-style-asian="italic" style:font-weight-asian="bold" style:font-style-complex="italic" style:font-weight-complex="bold"/>
    </style:style>
    <style:style style:name="T60" style:family="text">
      <style:text-properties fo:language="en" fo:country="US" fo:font-style="italic" fo:font-weight="bold" officeooo:rsid="008af631" style:font-style-asian="italic" style:font-weight-asian="bold" style:font-style-complex="italic" style:font-weight-complex="bold"/>
    </style:style>
    <style:style style:name="T61" style:family="text">
      <style:text-properties fo:language="en" fo:country="US" fo:font-style="italic" fo:font-weight="bold" officeooo:rsid="007f523c" style:font-style-asian="italic" style:font-weight-asian="bold" style:font-style-complex="italic" style:font-weight-complex="bold"/>
    </style:style>
    <style:style style:name="T62" style:family="text">
      <style:text-properties fo:language="en" fo:country="US" fo:font-style="italic" fo:font-weight="bold" officeooo:rsid="00902a75" style:font-style-asian="italic" style:font-weight-asian="bold" style:font-style-complex="italic" style:font-weight-complex="bold"/>
    </style:style>
    <style:style style:name="T63" style:family="text">
      <style:text-properties fo:language="en" fo:country="US" fo:font-style="italic" fo:font-weight="bold" officeooo:rsid="008e3bd1" style:font-style-asian="italic" style:font-weight-asian="bold" style:font-style-complex="italic" style:font-weight-complex="bold"/>
    </style:style>
    <style:style style:name="T64" style:family="text">
      <style:text-properties fo:language="en" fo:country="US" fo:font-style="italic" fo:font-weight="bold" officeooo:rsid="00963b44" style:font-style-asian="italic" style:font-weight-asian="bold" style:font-style-complex="italic" style:font-weight-complex="bold"/>
    </style:style>
    <style:style style:name="T65" style:family="text">
      <style:text-properties fo:language="en" fo:country="US" fo:font-style="italic" fo:font-weight="bold" officeooo:rsid="00970872" style:font-style-asian="italic" style:font-weight-asian="bold" style:font-style-complex="italic" style:font-weight-complex="bold"/>
    </style:style>
    <style:style style:name="T66" style:family="text">
      <style:text-properties fo:language="en" fo:country="US" fo:font-style="italic" fo:font-weight="bold" officeooo:rsid="00991d40" style:font-style-asian="italic" style:font-weight-asian="bold" style:font-style-complex="italic" style:font-weight-complex="bold"/>
    </style:style>
    <style:style style:name="T67" style:family="text">
      <style:text-properties fo:language="en" fo:country="US" fo:font-style="italic" fo:font-weight="bold" officeooo:rsid="009a738c" style:font-style-asian="italic" style:font-weight-asian="bold" style:font-style-complex="italic" style:font-weight-complex="bold"/>
    </style:style>
    <style:style style:name="T68" style:family="text">
      <style:text-properties fo:language="en" fo:country="US" fo:font-style="italic" fo:font-weight="bold" officeooo:rsid="00a3fc08" style:font-style-asian="italic" style:font-weight-asian="bold" style:font-style-complex="italic" style:font-weight-complex="bold"/>
    </style:style>
    <style:style style:name="T69" style:family="text">
      <style:text-properties fo:language="en" fo:country="US" fo:font-style="italic" fo:font-weight="bold" officeooo:rsid="00a9c9a3" style:font-style-asian="italic" style:font-weight-asian="bold" style:font-style-complex="italic" style:font-weight-complex="bold"/>
    </style:style>
    <style:style style:name="T70" style:family="text">
      <style:text-properties fo:language="en" fo:country="US" fo:font-style="italic" fo:font-weight="bold" officeooo:rsid="00a850f5" style:font-style-asian="italic" style:font-weight-asian="bold" style:font-style-complex="italic" style:font-weight-complex="bold"/>
    </style:style>
    <style:style style:name="T71" style:family="text">
      <style:text-properties fo:language="en" fo:country="US" fo:font-style="italic" fo:font-weight="bold" officeooo:rsid="00aa54e1" style:font-style-asian="italic" style:font-weight-asian="bold" style:font-style-complex="italic" style:font-weight-complex="bold"/>
    </style:style>
    <style:style style:name="T72" style:family="text">
      <style:text-properties fo:language="en" fo:country="US" fo:font-style="italic" fo:font-weight="bold" officeooo:rsid="00a670f0" style:font-style-asian="italic" style:font-weight-asian="bold" style:font-style-complex="italic" style:font-weight-complex="bold"/>
    </style:style>
    <style:style style:name="T73" style:family="text">
      <style:text-properties fo:language="en" fo:country="US" fo:font-style="italic" fo:font-weight="bold" officeooo:rsid="00866ada" style:font-style-asian="italic" style:font-weight-asian="bold" style:font-style-complex="italic" style:font-weight-complex="bold"/>
    </style:style>
    <style:style style:name="T74" style:family="text">
      <style:text-properties fo:language="en" fo:country="US" fo:font-style="italic" fo:font-weight="bold" officeooo:rsid="00c3d06c" style:font-style-asian="italic" style:font-weight-asian="bold" style:font-style-complex="italic" style:font-weight-complex="bold"/>
    </style:style>
    <style:style style:name="T75" style:family="text">
      <style:text-properties fo:language="en" fo:country="US" fo:font-style="italic" fo:font-weight="normal" officeooo:rsid="00812e2e" style:font-style-asian="italic" style:font-weight-asian="normal" style:font-style-complex="italic" style:font-weight-complex="normal"/>
    </style:style>
    <style:style style:name="T76" style:family="text">
      <style:text-properties fo:language="en" fo:country="US" fo:font-style="italic" fo:font-weight="normal" officeooo:rsid="00a850f5" style:font-style-asian="italic" style:font-weight-asian="normal" style:font-style-complex="italic" style:font-weight-complex="normal"/>
    </style:style>
    <style:style style:name="T77" style:family="text">
      <style:text-properties fo:language="en" fo:country="US" fo:font-style="italic" fo:font-weight="normal" officeooo:rsid="00aa54e1" style:font-style-asian="italic" style:font-weight-asian="normal" style:font-style-complex="italic" style:font-weight-complex="normal"/>
    </style:style>
    <style:style style:name="T78" style:family="text">
      <style:text-properties fo:language="en" fo:country="US" fo:font-style="italic" fo:font-weight="normal" officeooo:rsid="00bd5110" style:font-style-asian="italic" style:font-weight-asian="normal" style:font-style-complex="italic" style:font-weight-complex="normal"/>
    </style:style>
    <style:style style:name="T79" style:family="text">
      <style:text-properties fo:language="en" fo:country="US" fo:font-weight="bold" style:font-weight-asian="bold" style:font-weight-complex="bold"/>
    </style:style>
    <style:style style:name="T80" style:family="text">
      <style:text-properties fo:language="en" fo:country="US" fo:font-weight="bold" officeooo:rsid="001833cf" style:font-weight-asian="bold" style:font-weight-complex="bold"/>
    </style:style>
    <style:style style:name="T81" style:family="text">
      <style:text-properties fo:language="en" fo:country="US" fo:font-weight="bold" officeooo:rsid="001d88ce" style:font-weight-asian="bold" style:font-weight-complex="bold"/>
    </style:style>
    <style:style style:name="T82" style:family="text">
      <style:text-properties fo:language="en" fo:country="US" fo:font-weight="bold" officeooo:rsid="0020cb27" style:font-weight-asian="bold" style:font-weight-complex="bold"/>
    </style:style>
    <style:style style:name="T83" style:family="text">
      <style:text-properties fo:language="en" fo:country="US" fo:font-weight="bold" officeooo:rsid="002f8d0e" style:font-weight-asian="bold" style:font-weight-complex="bold"/>
    </style:style>
    <style:style style:name="T84" style:family="text">
      <style:text-properties fo:language="en" fo:country="US" fo:font-weight="bold" officeooo:rsid="0036611f" style:font-weight-asian="bold" style:font-weight-complex="bold"/>
    </style:style>
    <style:style style:name="T85" style:family="text">
      <style:text-properties fo:language="en" fo:country="US" fo:font-weight="bold" officeooo:rsid="003e42f4" style:font-weight-asian="bold" style:font-weight-complex="bold"/>
    </style:style>
    <style:style style:name="T86" style:family="text">
      <style:text-properties fo:language="en" fo:country="US" fo:font-weight="bold" officeooo:rsid="004037b3" style:font-weight-asian="bold" style:font-weight-complex="bold"/>
    </style:style>
    <style:style style:name="T87" style:family="text">
      <style:text-properties fo:language="en" fo:country="US" fo:font-weight="bold" officeooo:rsid="007a3171" style:font-weight-asian="bold" style:font-weight-complex="bold"/>
    </style:style>
    <style:style style:name="T88" style:family="text">
      <style:text-properties fo:language="en" fo:country="US" fo:font-weight="bold" officeooo:rsid="007d475b" style:font-weight-asian="bold" style:font-weight-complex="bold"/>
    </style:style>
    <style:style style:name="T89" style:family="text">
      <style:text-properties fo:language="en" fo:country="US" fo:font-weight="bold" officeooo:rsid="007f523c" style:font-weight-asian="bold" style:font-weight-complex="bold"/>
    </style:style>
    <style:style style:name="T90" style:family="text">
      <style:text-properties fo:language="en" fo:country="US" fo:font-weight="bold" officeooo:rsid="00812e2e" style:font-weight-asian="bold" style:font-weight-complex="bold"/>
    </style:style>
    <style:style style:name="T91" style:family="text">
      <style:text-properties fo:language="en" fo:country="US" fo:font-weight="bold" officeooo:rsid="00823ae3" style:font-weight-asian="bold" style:font-weight-complex="bold"/>
    </style:style>
    <style:style style:name="T92" style:family="text">
      <style:text-properties fo:language="en" fo:country="US" fo:font-weight="bold" officeooo:rsid="008773f3" style:font-weight-asian="bold" style:font-weight-complex="bold"/>
    </style:style>
    <style:style style:name="T93" style:family="text">
      <style:text-properties fo:language="en" fo:country="US" fo:font-weight="bold" officeooo:rsid="008af631" style:font-weight-asian="bold" style:font-weight-complex="bold"/>
    </style:style>
    <style:style style:name="T94" style:family="text">
      <style:text-properties fo:language="en" fo:country="US" fo:font-weight="bold" officeooo:rsid="00902a75" style:font-weight-asian="bold" style:font-weight-complex="bold"/>
    </style:style>
    <style:style style:name="T95" style:family="text">
      <style:text-properties fo:language="en" fo:country="US" fo:font-weight="bold" officeooo:rsid="00970872" style:font-weight-asian="bold" style:font-weight-complex="bold"/>
    </style:style>
    <style:style style:name="T96" style:family="text">
      <style:text-properties fo:language="en" fo:country="US" fo:font-weight="bold" officeooo:rsid="00983f3f" style:font-weight-asian="bold" style:font-weight-complex="bold"/>
    </style:style>
    <style:style style:name="T97" style:family="text">
      <style:text-properties fo:language="en" fo:country="US" fo:font-weight="bold" officeooo:rsid="009a738c" style:font-weight-asian="bold" style:font-weight-complex="bold"/>
    </style:style>
    <style:style style:name="T98" style:family="text">
      <style:text-properties fo:language="en" fo:country="US" fo:font-weight="bold" officeooo:rsid="00963b44" style:font-weight-asian="bold" style:font-weight-complex="bold"/>
    </style:style>
    <style:style style:name="T99" style:family="text">
      <style:text-properties fo:language="en" fo:country="US" fo:font-weight="bold" officeooo:rsid="009e009c" style:font-weight-asian="bold" style:font-weight-complex="bold"/>
    </style:style>
    <style:style style:name="T100" style:family="text">
      <style:text-properties fo:language="en" fo:country="US" fo:font-weight="bold" officeooo:rsid="00a850f5" style:font-weight-asian="bold" style:font-weight-complex="bold"/>
    </style:style>
    <style:style style:name="T101" style:family="text">
      <style:text-properties fo:language="en" fo:country="US" fo:font-weight="bold" officeooo:rsid="00aa54e1" style:font-weight-asian="bold" style:font-weight-complex="bold"/>
    </style:style>
    <style:style style:name="T102" style:family="text">
      <style:text-properties fo:language="en" fo:country="US" fo:font-weight="bold" officeooo:rsid="00bd5110" style:font-weight-asian="bold" style:font-weight-complex="bold"/>
    </style:style>
    <style:style style:name="T103" style:family="text">
      <style:text-properties fo:language="en" fo:country="US" fo:font-weight="bold" officeooo:rsid="00bf2314" style:font-weight-asian="bold" style:font-weight-complex="bold"/>
    </style:style>
    <style:style style:name="T104" style:family="text">
      <style:text-properties fo:language="en" fo:country="US" fo:font-weight="bold" officeooo:rsid="00c1c33a" style:font-weight-asian="bold" style:font-weight-complex="bold"/>
    </style:style>
    <style:style style:name="T105" style:family="text">
      <style:text-properties fo:language="en" fo:country="US" fo:font-weight="bold" officeooo:rsid="00c41c87" style:font-weight-asian="bold" style:font-weight-complex="bold"/>
    </style:style>
    <style:style style:name="T106" style:family="text">
      <style:text-properties fo:language="en" fo:country="US" fo:font-weight="bold" officeooo:rsid="00cd4d96" style:font-weight-asian="bold" style:font-weight-complex="bold"/>
    </style:style>
    <style:style style:name="T107" style:family="text">
      <style:text-properties fo:language="en" fo:country="US" fo:font-weight="bold" officeooo:rsid="00ce7832" style:font-weight-asian="bold" style:font-weight-complex="bold"/>
    </style:style>
    <style:style style:name="T108" style:family="text">
      <style:text-properties fo:language="en" fo:country="US" officeooo:rsid="001d88ce"/>
    </style:style>
    <style:style style:name="T109" style:family="text">
      <style:text-properties fo:language="en" fo:country="US" officeooo:rsid="0020cb27"/>
    </style:style>
    <style:style style:name="T110" style:family="text">
      <style:text-properties fo:language="en" fo:country="US" officeooo:rsid="00295662"/>
    </style:style>
    <style:style style:name="T111" style:family="text">
      <style:text-properties fo:language="en" fo:country="US" officeooo:rsid="002b4de7"/>
    </style:style>
    <style:style style:name="T112" style:family="text">
      <style:text-properties fo:language="en" fo:country="US" officeooo:rsid="002f8d0e"/>
    </style:style>
    <style:style style:name="T113" style:family="text">
      <style:text-properties fo:language="en" fo:country="US" officeooo:rsid="0031c416"/>
    </style:style>
    <style:style style:name="T114" style:family="text">
      <style:text-properties fo:language="en" fo:country="US" officeooo:rsid="003addc3"/>
    </style:style>
    <style:style style:name="T115" style:family="text">
      <style:text-properties fo:language="en" fo:country="US" officeooo:rsid="003cc09d"/>
    </style:style>
    <style:style style:name="T116" style:family="text">
      <style:text-properties fo:language="en" fo:country="US" officeooo:rsid="004037b3"/>
    </style:style>
    <style:style style:name="T117" style:family="text">
      <style:text-properties fo:language="en" fo:country="US" officeooo:rsid="0050220d"/>
    </style:style>
    <style:style style:name="T118" style:family="text">
      <style:text-properties fo:language="en" fo:country="US" officeooo:rsid="007a3171"/>
    </style:style>
    <style:style style:name="T119" style:family="text">
      <style:text-properties fo:language="en" fo:country="US" officeooo:rsid="007b8559"/>
    </style:style>
    <style:style style:name="T120" style:family="text">
      <style:text-properties fo:language="en" fo:country="US" officeooo:rsid="007d475b"/>
    </style:style>
    <style:style style:name="T121" style:family="text">
      <style:text-properties fo:language="en" fo:country="US" officeooo:rsid="007f523c"/>
    </style:style>
    <style:style style:name="T122" style:family="text">
      <style:text-properties fo:language="en" fo:country="US" fo:font-weight="normal" style:font-weight-asian="normal" style:font-weight-complex="normal"/>
    </style:style>
    <style:style style:name="T123" style:family="text">
      <style:text-properties fo:language="en" fo:country="US" fo:font-weight="normal" officeooo:rsid="007f523c" style:font-weight-asian="normal" style:font-weight-complex="normal"/>
    </style:style>
    <style:style style:name="T124" style:family="text">
      <style:text-properties fo:language="en" fo:country="US" fo:font-weight="normal" officeooo:rsid="00812e2e" style:font-weight-asian="normal" style:font-weight-complex="normal"/>
    </style:style>
    <style:style style:name="T125" style:family="text">
      <style:text-properties fo:language="en" fo:country="US" fo:font-weight="normal" officeooo:rsid="00823ae3" style:font-weight-asian="normal" style:font-weight-complex="normal"/>
    </style:style>
    <style:style style:name="T126" style:family="text">
      <style:text-properties fo:language="en" fo:country="US" fo:font-weight="normal" officeooo:rsid="00866ada" style:font-weight-asian="normal" style:font-weight-complex="normal"/>
    </style:style>
    <style:style style:name="T127" style:family="text">
      <style:text-properties fo:language="en" fo:country="US" fo:font-weight="normal" officeooo:rsid="008773f3" style:font-weight-asian="normal" style:font-weight-complex="normal"/>
    </style:style>
    <style:style style:name="T128" style:family="text">
      <style:text-properties fo:language="en" fo:country="US" fo:font-weight="normal" officeooo:rsid="008af631" style:font-weight-asian="normal" style:font-weight-complex="normal"/>
    </style:style>
    <style:style style:name="T129" style:family="text">
      <style:text-properties fo:language="en" fo:country="US" fo:font-weight="normal" officeooo:rsid="008cbad5" style:font-weight-asian="normal" style:font-weight-complex="normal"/>
    </style:style>
    <style:style style:name="T130" style:family="text">
      <style:text-properties fo:language="en" fo:country="US" fo:font-weight="normal" officeooo:rsid="008e3bd1" style:font-weight-asian="normal" style:font-weight-complex="normal"/>
    </style:style>
    <style:style style:name="T131" style:family="text">
      <style:text-properties fo:language="en" fo:country="US" fo:font-weight="normal" officeooo:rsid="00902a75" style:font-weight-asian="normal" style:font-weight-complex="normal"/>
    </style:style>
    <style:style style:name="T132" style:family="text">
      <style:text-properties fo:language="en" fo:country="US" fo:font-weight="normal" officeooo:rsid="00963b44" style:font-weight-asian="normal" style:font-weight-complex="normal"/>
    </style:style>
    <style:style style:name="T133" style:family="text">
      <style:text-properties fo:language="en" fo:country="US" fo:font-weight="normal" officeooo:rsid="00970872" style:font-weight-asian="normal" style:font-weight-complex="normal"/>
    </style:style>
    <style:style style:name="T134" style:family="text">
      <style:text-properties fo:language="en" fo:country="US" fo:font-weight="normal" officeooo:rsid="00983f3f" style:font-weight-asian="normal" style:font-weight-complex="normal"/>
    </style:style>
    <style:style style:name="T135" style:family="text">
      <style:text-properties fo:language="en" fo:country="US" fo:font-weight="normal" officeooo:rsid="007a3171" style:font-weight-asian="normal" style:font-weight-complex="normal"/>
    </style:style>
    <style:style style:name="T136" style:family="text">
      <style:text-properties fo:language="en" fo:country="US" fo:font-weight="normal" officeooo:rsid="00991d40" style:font-weight-asian="normal" style:font-weight-complex="normal"/>
    </style:style>
    <style:style style:name="T137" style:family="text">
      <style:text-properties fo:language="en" fo:country="US" fo:font-weight="normal" officeooo:rsid="009a738c" style:font-weight-asian="normal" style:font-weight-complex="normal"/>
    </style:style>
    <style:style style:name="T138" style:family="text">
      <style:text-properties fo:language="en" fo:country="US" fo:font-weight="normal" officeooo:rsid="009b3c1c" style:font-weight-asian="normal" style:font-weight-complex="normal"/>
    </style:style>
    <style:style style:name="T139" style:family="text">
      <style:text-properties fo:language="en" fo:country="US" fo:font-weight="normal" officeooo:rsid="009c366a" style:font-weight-asian="normal" style:font-weight-complex="normal"/>
    </style:style>
    <style:style style:name="T140" style:family="text">
      <style:text-properties fo:language="en" fo:country="US" fo:font-weight="normal" officeooo:rsid="009e009c" style:font-weight-asian="normal" style:font-weight-complex="normal"/>
    </style:style>
    <style:style style:name="T141" style:family="text">
      <style:text-properties fo:language="en" fo:country="US" fo:font-weight="normal" officeooo:rsid="009fcc25" style:font-weight-asian="normal" style:font-weight-complex="normal"/>
    </style:style>
    <style:style style:name="T142" style:family="text">
      <style:text-properties fo:language="en" fo:country="US" fo:font-weight="normal" officeooo:rsid="00a0d1ea" style:font-weight-asian="normal" style:font-weight-complex="normal"/>
    </style:style>
    <style:style style:name="T143" style:family="text">
      <style:text-properties fo:language="en" fo:country="US" fo:font-weight="normal" officeooo:rsid="00a3fc08" style:font-weight-asian="normal" style:font-weight-complex="normal"/>
    </style:style>
    <style:style style:name="T144" style:family="text">
      <style:text-properties fo:language="en" fo:country="US" fo:font-weight="normal" officeooo:rsid="00a670f0" style:font-weight-asian="normal" style:font-weight-complex="normal"/>
    </style:style>
    <style:style style:name="T145" style:family="text">
      <style:text-properties fo:language="en" fo:country="US" fo:font-weight="normal" officeooo:rsid="00a850f5" style:font-weight-asian="normal" style:font-weight-complex="normal"/>
    </style:style>
    <style:style style:name="T146" style:family="text">
      <style:text-properties fo:language="en" fo:country="US" fo:font-weight="normal" officeooo:rsid="00a9c9a3" style:font-weight-asian="normal" style:font-weight-complex="normal"/>
    </style:style>
    <style:style style:name="T147" style:family="text">
      <style:text-properties fo:language="en" fo:country="US" fo:font-weight="normal" officeooo:rsid="00aa54e1" style:font-weight-asian="normal" style:font-weight-complex="normal"/>
    </style:style>
    <style:style style:name="T148" style:family="text">
      <style:text-properties fo:language="en" fo:country="US" fo:font-weight="normal" officeooo:rsid="007b8559" style:font-weight-asian="normal" style:font-weight-complex="normal"/>
    </style:style>
    <style:style style:name="T149" style:family="text">
      <style:text-properties fo:language="en" fo:country="US" fo:font-weight="normal" officeooo:rsid="00b8a17b" style:font-weight-asian="normal" style:font-weight-complex="normal"/>
    </style:style>
    <style:style style:name="T150" style:family="text">
      <style:text-properties fo:language="en" fo:country="US" fo:font-weight="normal" officeooo:rsid="00bd5110" style:font-weight-asian="normal" style:font-weight-complex="normal"/>
    </style:style>
    <style:style style:name="T151" style:family="text">
      <style:text-properties fo:language="en" fo:country="US" fo:font-weight="normal" officeooo:rsid="00bf2314" style:font-weight-asian="normal" style:font-weight-complex="normal"/>
    </style:style>
    <style:style style:name="T152" style:family="text">
      <style:text-properties fo:language="en" fo:country="US" fo:font-weight="normal" officeooo:rsid="00c1c33a" style:font-weight-asian="normal" style:font-weight-complex="normal"/>
    </style:style>
    <style:style style:name="T153" style:family="text">
      <style:text-properties fo:language="en" fo:country="US" fo:font-weight="normal" officeooo:rsid="00c3d06c" style:font-weight-asian="normal" style:font-weight-complex="normal"/>
    </style:style>
    <style:style style:name="T154" style:family="text">
      <style:text-properties fo:language="en" fo:country="US" fo:font-weight="normal" officeooo:rsid="00c3e533" style:font-weight-asian="normal" style:font-weight-complex="normal"/>
    </style:style>
    <style:style style:name="T155" style:family="text">
      <style:text-properties fo:language="en" fo:country="US" fo:font-weight="normal" officeooo:rsid="00c41c87" style:font-weight-asian="normal" style:font-weight-complex="normal"/>
    </style:style>
    <style:style style:name="T156" style:family="text">
      <style:text-properties fo:language="en" fo:country="US" officeooo:rsid="00a850f5"/>
    </style:style>
    <style:style style:name="T157" style:family="text">
      <style:text-properties fo:language="en" fo:country="US" fo:font-style="normal" fo:font-weight="normal" officeooo:rsid="00aa54e1" style:font-style-asian="normal" style:font-weight-asian="normal" style:font-style-complex="normal" style:font-weight-complex="normal"/>
    </style:style>
    <style:style style:name="T158" style:family="text">
      <style:text-properties fo:language="en" fo:country="US" officeooo:rsid="00b8a17b"/>
    </style:style>
    <style:style style:name="T159" style:family="text">
      <style:text-properties fo:language="en" fo:country="US" officeooo:rsid="00ce7832"/>
    </style:style>
    <style:style style:name="T160" style:family="text">
      <style:text-properties officeooo:rsid="0018ddee"/>
    </style:style>
    <style:style style:name="T161" style:family="text">
      <style:text-properties officeooo:rsid="001d88ce"/>
    </style:style>
    <style:style style:name="T162" style:family="text">
      <style:text-properties officeooo:rsid="001f0127"/>
    </style:style>
    <style:style style:name="T163" style:family="text">
      <style:text-properties officeooo:rsid="002194a7"/>
    </style:style>
    <style:style style:name="T164" style:family="text">
      <style:text-properties officeooo:rsid="002245e9"/>
    </style:style>
    <style:style style:name="T165" style:family="text">
      <style:text-properties officeooo:rsid="0022ec0b"/>
    </style:style>
    <style:style style:name="T166" style:family="text">
      <style:text-properties officeooo:rsid="00254840"/>
    </style:style>
    <style:style style:name="T167" style:family="text">
      <style:text-properties officeooo:rsid="0027c4b4"/>
    </style:style>
    <style:style style:name="T168" style:family="text">
      <style:text-properties officeooo:rsid="00295662"/>
    </style:style>
    <style:style style:name="T169" style:family="text">
      <style:text-properties officeooo:rsid="002bff72"/>
    </style:style>
    <style:style style:name="T170" style:family="text">
      <style:text-properties style:text-position="super 58%" fo:language="en" fo:country="US" fo:font-weight="bold" officeooo:rsid="002f8d0e" style:font-weight-asian="bold" style:font-weight-complex="bold"/>
    </style:style>
    <style:style style:name="T171" style:family="text">
      <style:text-properties style:text-position="super 58%" fo:language="en" fo:country="US" fo:font-weight="bold" officeooo:rsid="00c0abbf" style:font-weight-asian="bold" style:font-weight-complex="bold"/>
    </style:style>
    <style:style style:name="T172" style:family="text">
      <style:text-properties style:text-position="super 58%" fo:language="en" fo:country="US" fo:font-weight="bold" officeooo:rsid="00bd5110" style:font-weight-asian="bold" style:font-weight-complex="bold"/>
    </style:style>
    <style:style style:name="T173" style:family="text">
      <style:text-properties style:text-position="super 58%" fo:language="en" fo:country="US" fo:font-weight="bold" officeooo:rsid="00cd4d96" style:font-weight-asian="bold" style:font-weight-complex="bold"/>
    </style:style>
    <style:style style:name="T174" style:family="text">
      <style:text-properties style:text-position="super 58%" fo:language="en" fo:country="US" fo:font-weight="normal" officeooo:rsid="00bd5110" style:font-weight-asian="normal" style:font-weight-complex="normal"/>
    </style:style>
    <style:style style:name="T175" style:family="text">
      <style:text-properties style:text-position="super 58%" fo:font-weight="bold" officeooo:rsid="00ab8e3f" style:font-weight-asian="bold" style:font-weight-complex="bold"/>
    </style:style>
    <style:style style:name="T176" style:family="text">
      <style:text-properties officeooo:rsid="00333e55"/>
    </style:style>
    <style:style style:name="T177" style:family="text">
      <style:text-properties officeooo:rsid="004154c2"/>
    </style:style>
    <style:style style:name="T178" style:family="text">
      <style:text-properties officeooo:rsid="00431cd7"/>
    </style:style>
    <style:style style:name="T179" style:family="text">
      <style:text-properties officeooo:rsid="0045153a"/>
    </style:style>
    <style:style style:name="T180" style:family="text">
      <style:text-properties officeooo:rsid="0046b5ce"/>
    </style:style>
    <style:style style:name="T181" style:family="text">
      <style:text-properties officeooo:rsid="0052390a"/>
    </style:style>
    <style:style style:name="T182" style:family="text">
      <style:text-properties officeooo:rsid="0052e7bf"/>
    </style:style>
    <style:style style:name="T183" style:family="text">
      <style:text-properties officeooo:rsid="0053f9c5"/>
    </style:style>
    <style:style style:name="T184" style:family="text">
      <style:text-properties officeooo:rsid="00557ee1"/>
    </style:style>
    <style:style style:name="T185" style:family="text">
      <style:text-properties fo:font-weight="normal" officeooo:rsid="005a59d7" style:font-weight-asian="normal" style:font-weight-complex="normal"/>
    </style:style>
    <style:style style:name="T186" style:family="text">
      <style:text-properties fo:font-weight="normal" officeooo:rsid="005a693f" style:font-weight-asian="normal" style:font-weight-complex="normal"/>
    </style:style>
    <style:style style:name="T187" style:family="text">
      <style:text-properties fo:font-weight="normal" officeooo:rsid="00557ee1" style:font-weight-asian="normal" style:font-weight-complex="normal"/>
    </style:style>
    <style:style style:name="T188" style:family="text">
      <style:text-properties fo:font-weight="normal" officeooo:rsid="005b45a8" style:font-weight-asian="normal" style:font-weight-complex="normal"/>
    </style:style>
    <style:style style:name="T189" style:family="text">
      <style:text-properties fo:font-weight="normal" officeooo:rsid="0087f5e6" style:font-weight-asian="normal" style:font-weight-complex="normal"/>
    </style:style>
    <style:style style:name="T190" style:family="text">
      <style:text-properties fo:font-style="normal" fo:font-weight="normal" officeooo:rsid="00557ee1" style:font-style-asian="normal" style:font-weight-asian="normal" style:font-style-complex="normal" style:font-weight-complex="normal"/>
    </style:style>
    <style:style style:name="T191" style:family="text">
      <style:text-properties officeooo:rsid="00572de4"/>
    </style:style>
    <style:style style:name="T192" style:family="text">
      <style:text-properties officeooo:rsid="005a693f"/>
    </style:style>
    <style:style style:name="T193" style:family="text">
      <style:text-properties officeooo:rsid="005ced4d"/>
    </style:style>
    <style:style style:name="T194" style:family="text">
      <style:text-properties officeooo:rsid="005e04f3"/>
    </style:style>
    <style:style style:name="T195" style:family="text">
      <style:text-properties officeooo:rsid="005f9a19"/>
    </style:style>
    <style:style style:name="T196" style:family="text">
      <style:text-properties officeooo:rsid="006034a0"/>
    </style:style>
    <style:style style:name="T197" style:family="text">
      <style:text-properties officeooo:rsid="00620e83"/>
    </style:style>
    <style:style style:name="T198" style:family="text">
      <style:text-properties officeooo:rsid="0063af2a"/>
    </style:style>
    <style:style style:name="T199" style:family="text">
      <style:text-properties officeooo:rsid="00682657"/>
    </style:style>
    <style:style style:name="T200" style:family="text">
      <style:text-properties officeooo:rsid="00690202"/>
    </style:style>
    <style:style style:name="T201" style:family="text">
      <style:text-properties officeooo:rsid="00699143"/>
    </style:style>
    <style:style style:name="T202" style:family="text">
      <style:text-properties officeooo:rsid="006ab25b"/>
    </style:style>
    <style:style style:name="T203" style:family="text">
      <style:text-properties officeooo:rsid="006ade5a"/>
    </style:style>
    <style:style style:name="T204" style:family="text">
      <style:text-properties officeooo:rsid="006b085c"/>
    </style:style>
    <style:style style:name="T205" style:family="text">
      <style:text-properties officeooo:rsid="006be3fc"/>
    </style:style>
    <style:style style:name="T206" style:family="text">
      <style:text-properties officeooo:rsid="006c7b75"/>
    </style:style>
    <style:style style:name="T207" style:family="text">
      <style:text-properties officeooo:rsid="006d80a9"/>
    </style:style>
    <style:style style:name="T208" style:family="text">
      <style:text-properties officeooo:rsid="006f6a67"/>
    </style:style>
    <style:style style:name="T209" style:family="text">
      <style:text-properties officeooo:rsid="0070ed77"/>
    </style:style>
    <style:style style:name="T210" style:family="text">
      <style:text-properties officeooo:rsid="0071cebf"/>
    </style:style>
    <style:style style:name="T211" style:family="text">
      <style:text-properties officeooo:rsid="00732252"/>
    </style:style>
    <style:style style:name="T212" style:family="text">
      <style:text-properties officeooo:rsid="0076a7ef"/>
    </style:style>
    <style:style style:name="T213" style:family="text">
      <style:text-properties officeooo:rsid="00784332"/>
    </style:style>
    <style:style style:name="T214" style:family="text">
      <style:text-properties style:font-name="LM Mono Slanted 10"/>
    </style:style>
    <style:style style:name="T215" style:family="text">
      <style:text-properties style:font-name="LM Mono Slanted 10" fo:font-weight="bold" style:font-weight-asian="bold" style:font-weight-complex="bold"/>
    </style:style>
    <style:style style:name="T216" style:family="text">
      <style:text-properties officeooo:rsid="007a3171"/>
    </style:style>
    <style:style style:name="T217" style:family="text">
      <style:text-properties officeooo:rsid="007f523c"/>
    </style:style>
    <style:style style:name="T218" style:family="text">
      <style:text-properties officeooo:rsid="00844ec4"/>
    </style:style>
    <style:style style:name="T219" style:family="text">
      <style:text-properties officeooo:rsid="008773f3"/>
    </style:style>
    <style:style style:name="T220" style:family="text">
      <style:text-properties officeooo:rsid="008951e6"/>
    </style:style>
    <style:style style:name="T221" style:family="text">
      <style:text-properties officeooo:rsid="0089cf48"/>
    </style:style>
    <style:style style:name="T222" style:family="text">
      <style:text-properties officeooo:rsid="0093f53a"/>
    </style:style>
    <style:style style:name="T223" style:family="text">
      <style:text-properties officeooo:rsid="00ab8e3f"/>
    </style:style>
    <style:style style:name="T224" style:family="text">
      <style:text-properties officeooo:rsid="00abbaf9"/>
    </style:style>
    <style:style style:name="T225" style:family="text">
      <style:text-properties officeooo:rsid="00ad7cf0"/>
    </style:style>
    <style:style style:name="T226" style:family="text">
      <style:text-properties officeooo:rsid="00afe5cc"/>
    </style:style>
    <style:style style:name="T227" style:family="text">
      <style:text-properties officeooo:rsid="00b1b759"/>
    </style:style>
    <style:style style:name="T228" style:family="text">
      <style:text-properties officeooo:rsid="00b8a17b"/>
    </style:style>
    <style:style style:name="T229" style:family="text">
      <style:text-properties style:text-position="0% 100%" fo:font-weight="normal" officeooo:rsid="00ab8e3f" style:font-weight-asian="normal" style:font-weight-complex="normal"/>
    </style:style>
    <style:style style:name="T230" style:family="text">
      <style:text-properties style:text-position="0% 100%" fo:font-weight="bold" officeooo:rsid="00ab8e3f" style:font-weight-asian="bold" style:font-weight-complex="bold"/>
    </style:style>
    <style:style style:name="T231" style:family="text">
      <style:text-properties style:text-position="0% 100%" fo:font-weight="bold" officeooo:rsid="00c41c87" style:font-weight-asian="bold" style:font-weight-complex="bold"/>
    </style:style>
    <style:style style:name="T232" style:family="text">
      <style:text-properties officeooo:rsid="00c4dc56"/>
    </style:style>
    <style:style style:name="T233" style:family="text">
      <style:text-properties officeooo:rsid="00c52e82"/>
    </style:style>
    <style:style style:name="T234" style:family="text">
      <style:text-properties officeooo:rsid="00c6d00f"/>
    </style:style>
    <style:style style:name="T235" style:family="text">
      <style:text-properties officeooo:rsid="00c8be71"/>
    </style:style>
    <style:style style:name="T236" style:family="text">
      <style:text-properties officeooo:rsid="00ca0fbc"/>
    </style:style>
    <style:style style:name="T237" style:family="text">
      <style:text-properties officeooo:rsid="00cb8e97"/>
    </style:style>
    <style:style style:name="T238" style:family="text">
      <style:text-properties officeooo:rsid="00cb9706"/>
    </style:style>
    <style:style style:name="T239" style:family="text">
      <style:text-properties officeooo:rsid="00d1e905"/>
    </style:style>
    <style:style style:name="fr1"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Music Melody Heuristic <text:span text:style-name="T1">Method</text:span></text:p>
      <text:p text:style-name="P3">MMHM</text:p>
      <text:p text:style-name="P4"/>
      <text:h text:style-name="P35" text:outline-level="1"><text:span text:style-name="T2">What a </text:span>Music Melody <text:span text:style-name="T180">is</text:span></text:h>
      <text:p text:style-name="Text_20_body"/>
      <text:p text:style-name="P8">A music melody (MM) is a sequence of <text:s/><text:span text:style-name="T31">n</text:span> notes, <text:span text:style-name="T160">with</text:span> <text:span text:style-name="T31">n</text:span> typically a small number ranging from a minimum <text:span text:style-name="T48">of </text:span><text:span text:style-name="T3">2</text:span> to a maximum of about <text:span text:style-name="T4">1</text:span><text:span text:style-name="T6">0</text:span>. Notes in a melody are not required to have all the same duration, but one can expect that most <text:span text:style-name="T27">nice</text:span> melodies whose notes <text:span text:style-name="T3">do not</text:span> all have the same <text:s/>duration <text:span text:style-name="T27">would not </text:span><text:span text:style-name="T32">entirely </text:span><text:span text:style-name="T27">loose their </text:span><text:span text:style-name="T32">character</text:span> if its notes <text:span text:style-name="T177">are</text:span><text:span text:style-name="T163"> </text:span>played <text:span text:style-name="T178">with</text:span><text:span text:style-name="T164"> </text:span>a <text:span text:style-name="T27">constant</text:span>, <text:span text:style-name="T27">duration</text:span>. </text:p>
      <text:p text:style-name="P7"><text:span text:style-name="T49">Another reasonable assumption is that a </text:span><text:span text:style-name="T33">constant translation of pitch</text:span><text:span text:style-name="T49"> (up or down) applied to all notes of a melody would not change the essence of the sensory experience in most indi</text:span><text:span text:style-name="T165">vi</text:span><text:span text:style-name="T49">duals (except perhaps those rare people endowed by nature of the so-called abolute pitch). <text:s/></text:span><text:span text:style-name="T176">In other words, for the purposes of this software </text:span><text:span text:style-name="T29">any two melodies are considered the SAME melody </text:span><text:span text:style-name="T27">if one can be obtained from the other by applying a uniform translation of pitch</text:span>!</text:p>
      <text:p text:style-name="P9"><text:span text:style-name="T27">Neglecting the difference between black and white keys</text:span> on a piano keyboard, we have thus a <text:span text:style-name="T25">palette </text:span>of about 7 octaves, each octave including <text:span text:style-name="T3">12</text:span> distinct notes. In this palette, the pitch difference betwen each note and its two neighboring notes is <text:span text:style-name="T5">1</text:span> semi-tone. <text:line-break/><text:span text:style-name="T166">Therefore</text:span>, given <text:s text:c="2"/><draw:frame draw:style-name="fr1" draw:name="Object1" text:anchor-type="as-char" svg:y="-0.379cm" svg:width="0.228cm" svg:height="0.471cm" draw:z-index="0"><draw:object xlink:href="./Object 1" xlink:type="simple" xlink:show="embed" xlink:actuate="onLoad"/><draw:image xlink:href="./ObjectReplacements/Object 1" xlink:type="simple" xlink:show="embed" xlink:actuate="onLoad"/></draw:frame><text:s text:c="2"/>the frequency <text:span text:style-name="T50">(pitch) </text:span>of <text:span text:style-name="T50">a </text:span><text:s/><text:span text:style-name="T30">piano key</text:span> , <text:s/><text:span text:style-name="T50">and </text:span><text:span text:style-name="T28"><draw:frame draw:style-name="fr1" draw:name="Object2" text:anchor-type="as-char" svg:y="-0.379cm" svg:width="0.224cm" svg:height="0.471cm" draw:z-index="1"><draw:object xlink:href="./Object 2" xlink:type="simple" xlink:show="embed" xlink:actuate="onLoad"/><draw:image xlink:href="./ObjectReplacements/Object 2" xlink:type="simple" xlink:show="embed" xlink:actuate="onLoad"/></draw:frame></text:span><text:span text:style-name="T28"><text:s/>the twelfth root of 2</text:span><text:span text:style-name="T50">, the immediately </text:span><text:span text:style-name="T28">preceding</text:span><text:span text:style-name="T50"> </text:span><text:span text:style-name="T179">key’s note </text:span><text:span text:style-name="T50">has frequency </text:span><draw:frame draw:style-name="fr1" draw:name="Object3" text:anchor-type="as-char" svg:y="-0.379cm" svg:width="0.228cm" svg:height="0.471cm" draw:z-index="2"><draw:object xlink:href="./Object 3" xlink:type="simple" xlink:show="embed" xlink:actuate="onLoad"/><draw:image xlink:href="./ObjectReplacements/Object 3" xlink:type="simple" xlink:show="embed" xlink:actuate="onLoad"/><svg:desc>formula</svg:desc></draw:frame><text:s/><text:span text:style-name="T51">/</text:span><text:span text:style-name="T50"> </text:span><text:span text:style-name="T50"><draw:frame draw:style-name="fr1" draw:name="Object4" text:anchor-type="as-char" svg:y="-0.379cm" svg:width="0.224cm" svg:height="0.471cm" draw:z-index="3"><draw:object xlink:href="./Object 4" xlink:type="simple" xlink:show="embed" xlink:actuate="onLoad"/><draw:image xlink:href="./ObjectReplacements/Object 4" xlink:type="simple" xlink:show="embed" xlink:actuate="onLoad"/><svg:desc>formula</svg:desc></draw:frame></text:span><text:span text:style-name="T50"><text:s text:c="3"/></text:span><text:span text:style-name="T51">while the immediately following </text:span><text:span text:style-name="T179">key produces a note whose</text:span><text:span text:style-name="T51"> f</text:span><text:span text:style-name="T50">requency </text:span><text:span text:style-name="T179">is</text:span><text:span text:style-name="T50"> <text:s/></text:span><text:span text:style-name="T50"><draw:frame draw:style-name="fr1" draw:name="Object6" text:anchor-type="as-char" svg:y="-0.379cm" svg:width="0.224cm" svg:height="0.471cm" draw:z-index="4"><draw:object xlink:href="./Object 6" xlink:type="simple" xlink:show="embed" xlink:actuate="onLoad"/><draw:image xlink:href="./ObjectReplacements/Object 6" xlink:type="simple" xlink:show="embed" xlink:actuate="onLoad"/><svg:desc>formula</svg:desc></draw:frame></text:span><text:span text:style-name="T50"><text:s/></text:span><text:span text:style-name="T51">times </text:span><draw:frame draw:style-name="fr1" draw:name="Object5" text:anchor-type="as-char" svg:y="-0.379cm" svg:width="0.228cm" svg:height="0.471cm" draw:z-index="5"><draw:object xlink:href="./Object 5" xlink:type="simple" xlink:show="embed" xlink:actuate="onLoad"/><draw:image xlink:href="./ObjectReplacements/Object 5" xlink:type="simple" xlink:show="embed" xlink:actuate="onLoad"/><svg:desc>formula</svg:desc></draw:frame>. <text:span text:style-name="T50"><text:s text:c="2"/></text:span></text:p>
      <text:p text:style-name="P10"><text:span text:style-name="T167">We th</text:span><text:span text:style-name="T168">erefore adopt</text:span><text:span text:style-name="T52"> the very general </text:span><text:span text:style-name="T168">perspective </text:span><text:span text:style-name="T52">that </text:span><text:span text:style-name="T34">a melody</text:span><text:span text:style-name="T55"> of</text:span><text:span text:style-name="T53"> </text:span><text:span text:style-name="T80">N</text:span><text:span text:style-name="T84">+1</text:span><text:span text:style-name="T53"> notes </text:span><text:span text:style-name="T54">is </text:span><text:span text:style-name="T53">completely specified by </text:span><text:span text:style-name="T54">the </text:span><text:span text:style-name="T80">N</text:span><text:span text:style-name="T53"> numbers </text:span><text:span text:style-name="T110">indicating</text:span><text:span text:style-name="T53"> the </text:span><text:span text:style-name="T55">distance in semitones</text:span><text:span text:style-name="T53"> between one note and the </text:span><text:span text:style-name="T111">next</text:span><text:span text:style-name="T53">.</text:span></text:p>
      <text:p text:style-name="P11">On<text:span text:style-name="T169">c</text:span>e these <text:s/><text:span text:style-name="T80">N</text:span><text:span text:style-name="T53"> numbers are given, the </text:span><text:span text:style-name="T58">melody</text:span><text:span text:style-name="T55"> notes are obtained by choosing the first one at will</text:span><text:span text:style-name="T53">.</text:span></text:p>
      <text:p text:style-name="P43"><text:span text:style-name="T108">Let assume </text:span><text:span text:style-name="T56">distance</text:span><text:span text:style-name="T57">s</text:span><text:span text:style-name="T56"> in semitones</text:span><text:span text:style-name="T108"> be allowed to vary in the [</text:span><text:span text:style-name="T81">-m:+m</text:span><text:span text:style-name="T108">] range, where </text:span><text:span text:style-name="T81">m</text:span><text:span text:style-name="T108"> is a positive integer. This implies that the </text:span><text:span text:style-name="T56">distance in semitones between two consecutive notes</text:span><text:span text:style-name="T108"> can take </text:span><text:span text:style-name="T81">2m+1</text:span><text:span text:style-name="T108"> </text:span><text:span text:style-name="T81">distinct values</text:span><text:span text:style-name="T81"><text:note text:id="ftn1" text:note-class="footnote"><text:note-citation>1</text:note-citation><text:note-body><text:list text:style-name="L1"><text:list-item><text:p text:style-name="P34"><text:span text:style-name="T161">One might want to forbid melodies containing consecutive repetitions of the same note. This would be simply specified by eliminating the zero (0) from the set of allowed pitch distances between consecutive </text:span><text:span text:style-name="T162">notes</text:span><text:span text:style-name="T161">. </text:span></text:p></text:list-item></text:list></text:note-body></text:note></text:span><text:span text:style-name="T108">. <text:s text:c="4"/></text:span><text:span text:style-name="T109">Once </text:span><text:span text:style-name="T82">N</text:span><text:span text:style-name="T109"> and </text:span><text:span text:style-name="T82">m</text:span><text:span text:style-name="T109"> are specified, simple combinatorial calculations give us the total number </text:span><text:span text:style-name="T100">Z</text:span><text:span text:style-name="T109"> of distinct melodies, </text:span><text:span text:style-name="T156">namely</text:span><text:span text:style-name="T109"> (</text:span><text:span text:style-name="T82">2m+1</text:span><text:span text:style-name="T109">) raised to the power </text:span><text:span text:style-name="T82">N</text:span><text:span text:style-name="T109">. </text:span></text:p>
      <text:p text:style-name="P13"><text:span text:style-name="T83">E</text:span><text:span text:style-name="T79">xample</text:span><text:span text:style-name="T53">: </text:span><text:span text:style-name="T79">N</text:span><text:span text:style-name="T53"> = 1</text:span><text:span text:style-name="T115">0</text:span><text:span text:style-name="T53">, </text:span><text:span text:style-name="T79">m</text:span><text:span text:style-name="T53">=5 <text:s/></text:span><text:span text:style-name="T112">give </text:span><text:span text:style-name="T100">Z</text:span><text:span text:style-name="T113"> =</text:span><text:span text:style-name="T112"> </text:span><text:span text:style-name="T83">1</text:span><text:span text:style-name="T106">1</text:span><text:span text:style-name="T170">1</text:span><text:span text:style-name="T173">0</text:span><text:span text:style-name="T112"> </text:span><text:span text:style-name="T159">that is, approximately, </text:span><text:span text:style-name="T107">26</text:span><text:span text:style-name="T83"> billions</text:span><text:span text:style-name="T112">!</text:span><text:span text:style-name="T53"> </text:span></text:p>
      <text:p text:style-name="P12"><text:span text:style-name="T109">How could </text:span><text:span text:style-name="T114">one</text:span><text:span text:style-name="T109"> hope to </text:span><text:span text:style-name="T117">identify</text:span><text:span text:style-name="T109"> beautiful melodies by searching for them in such a vast sea? </text:span></text:p>
      <text:p text:style-name="P24">That is the theme of the next section.</text:p>
      <text:h text:style-name="P36" text:outline-level="1"><text:span text:style-name="T181">Making sense of melod</text:span><text:span text:style-name="T182">y search </text:span><text:span text:style-name="T181">in th</text:span><text:span text:style-name="T218">at</text:span><text:span text:style-name="T181"> vast sea</text:span></text:h>
      <text:p text:style-name="P15"><text:span text:style-name="T182">There are a number of reflections that can help one’s search of beautiful melodies within the billions of possible sequences of admitted pitch variations. In order to keep the language clear, we use the term “</text:span><text:span text:style-name="T35">interval</text:span><text:span text:style-name="T182">” to indicate the </text:span><text:span text:style-name="T35">number of semitones</text:span><text:span text:style-name="T182"> which separates one melody note from the next. <text:line-break/>A melody of N+1 notes is th</text:span><text:span text:style-name="T183">en</text:span><text:span text:style-name="T182"> fully characterized by </text:span><text:span text:style-name="T183">its</text:span><text:span text:style-name="T182"> </text:span><text:span text:style-name="T7">N</text:span><text:span text:style-name="T182"> </text:span><text:span text:style-name="T35">intervals</text:span><text:span text:style-name="T182">, </text:span><text:span text:style-name="T184">that is: N </text:span><text:span text:style-name="T47">integer numbers</text:span><text:span text:style-name="T190">.</text:span><text:span text:style-name="T184"> Each one of these </text:span><text:span text:style-name="T191">numbers</text:span><text:span text:style-name="T184"> is </text:span><text:span text:style-name="T191">c</text:span><text:span text:style-name="T184">onstrained to be chosen from a </text:span><text:span text:style-name="T191">set of </text:span><text:span text:style-name="T38">Ad</text:span><text:span text:style-name="T36">missible </text:span><text:span text:style-name="T38">P</text:span><text:span text:style-name="T37">itch </text:span><text:span text:style-name="T38">D</text:span><text:span text:style-name="T37">istances</text:span><text:span text:style-name="T184"> (</text:span><text:span text:style-name="T9">APD</text:span><text:span text:style-name="T184">). In most cases, the </text:span><text:span text:style-name="T8">A</text:span><text:span text:style-name="T10">PD</text:span><text:span text:style-name="T184"> is determined by a relatively small integer </text:span><text:span text:style-name="T8">m</text:span><text:span text:style-name="T184"> as it will include the </text:span><text:span text:style-name="T14">2m</text:span><text:span text:style-name="T8">+1</text:span><text:span text:style-name="T184"> integers </text:span><text:span text:style-name="T195">which belong to the set of </text:span><text:span text:style-name="T184">all integers </text:span><text:span text:style-name="T192">within</text:span><text:span text:style-name="T184"> </text:span><text:span text:style-name="T11">[</text:span><text:span text:style-name="T184">-</text:span><text:span text:style-name="T8">m</text:span><text:span text:style-name="T184">, +</text:span><text:span text:style-name="T8">m</text:span><text:span text:style-name="T11">]</text:span><text:span text:style-name="T11"><text:note text:id="ftn2" text:note-class="footnote"><text:note-citation>2</text:note-citation><text:note-body><text:p text:style-name="P1">There must be no constraint in the software to force the APD to be of the <text:span text:style-name="T3">[-m, +m]</text:span> <text:s/>type: The <text:span text:style-name="T3">APD integers can be just be given explicitely as an unordered array of integers</text:span>. However, giving the APD some structure may be helpful in that it could ma<text:span text:style-name="T196">k</text:span>e it easier to interpret results, <text:span text:style-name="T193">especially in the testing phase of the software.</text:span></text:p></text:note-body></text:note></text:span><text:span text:style-name="T185">. </text:span></text:p>
      <text:p text:style-name="P16"><text:span text:style-name="T186">Let the </text:span><text:span text:style-name="T12">APD</text:span><text:span text:style-name="T186"> set be specified and let </text:span><text:span text:style-name="T12">M</text:span><text:span text:style-name="T186"> be its cardinality . </text:span></text:p>
      <text:p text:style-name="P16"><text:span text:style-name="T12">Example</text:span><text:span text:style-name="T186">: </text:span><text:span text:style-name="T188">Taking as </text:span><text:span text:style-name="T186">APD the set of all integers </text:span><text:span text:style-name="T187"><text:s/></text:span><text:span text:style-name="T186">within</text:span><text:span text:style-name="T187"> </text:span><text:span text:style-name="T185">[</text:span><text:span text:style-name="T187">-</text:span><text:span text:style-name="T8">m</text:span><text:span text:style-name="T187">, +</text:span><text:span text:style-name="T8">m</text:span><text:span text:style-name="T11">]</text:span><text:span text:style-name="T186"> <text:s/>we have </text:span><text:span text:style-name="T12">M = 2m+1</text:span><text:span text:style-name="T186">. </text:span></text:p>
      <text:p text:style-name="P14"><text:span text:style-name="T194">The </text:span><text:span text:style-name="T182">“</text:span><text:span text:style-name="T35">rotation</text:span><text:span text:style-name="T182">” of a melody </text:span><text:span text:style-name="T194">(</text:span><text:span text:style-name="T182">sequence of </text:span><text:span text:style-name="T13">N</text:span><text:span text:style-name="T194"> </text:span><text:span text:style-name="T182">pitch variations</text:span><text:span text:style-name="T194">)</text:span><text:span text:style-name="T182"> </text:span><text:span text:style-name="T194">can be visualized by imagining the N values printed on </text:span><text:span text:style-name="T197">a </text:span><text:span text:style-name="T39">ribbon of length</text:span><text:span text:style-name="T194"> </text:span><text:span text:style-name="T13">L</text:span><text:span text:style-name="T194"> that is </text:span><text:span text:style-name="T39">wrapped around a cylinder</text:span><text:span text:style-name="T194"> whose circumference is exactly equal to L. </text:span><text:span text:style-name="T198">Hence </text:span><text:span text:style-name="T194">the first integer will touch the last one. After choosing the sense of rotation (e.g. clock-wise) one can start the melody at any place. </text:span></text:p>
      <text:p text:style-name="P17">This is a <text:span text:style-name="T3">crucial point for all that follows</text:span>: we are going to treat <text:span text:style-name="T27">all</text:span> the <text:span text:style-name="T3">N</text:span>, <text:span text:style-name="T27">possibly distinct</text:span> <text:span text:style-name="T27">sequences</text:span> of N pitch variations <text:span text:style-name="T46">resulting from arbitrarily choosing the starting point</text:span>, as <text:line-break/><text:span text:style-name="T27">equivalent representatives of a melody class</text:span>. <text:s text:c="3"/></text:p>
      <text:p text:style-name="P18">The next most useful concept is the identification of <text:span text:style-name="T200">a</text:span> whole <text:span text:style-name="T39">melody class </text:span><text:span text:style-name="T27">by </text:span>a<text:span text:style-name="T201">n</text:span> <text:span text:style-name="T27">integer</text:span><text:span text:style-name="T46">.</text:span> This number we call the melody class Id (<text:span text:style-name="T3">MC-Id</text:span>). The <text:span text:style-name="T3">MC-Id</text:span> of a melody class and the cardinality <text:span text:style-name="T3">M</text:span> of the associated <text:span text:style-name="T3">APD set</text:span> are necessary and sufficient to <text:span text:style-name="T199">uniquely </text:span>determine <text:span text:style-name="T199">a specific member (melody) of the melody class. </text:span><text:span text:style-name="T202">T</text:span><text:span text:style-name="T201">he </text:span><text:span text:style-name="T199">other members of the melody class </text:span><text:span text:style-name="T201">are obtained </text:span><text:span text:style-name="T199">by </text:span><text:span text:style-name="T194"><text:s/></text:span><text:span text:style-name="T182">“</text:span><text:span text:style-name="T35">rotation</text:span><text:span text:style-name="T182">” </text:span><text:span text:style-name="T203">from this one</text:span><text:span text:style-name="T182">. </text:span><text:span text:style-name="T204">All this is enabled by the method one uses to associate a melody class to an integer.</text:span></text:p>
      <text:h text:style-name="P37" text:outline-level="2"><text:span text:style-name="T206">Identifying </text:span><text:span text:style-name="T205">melody classes </text:span><text:span text:style-name="T206">by </text:span><text:span text:style-name="T205">a unique </text:span><text:span text:style-name="T208">integer</text:span></text:h>
      <text:p text:style-name="P19"><text:span text:style-name="T205"><text:s/></text:span><text:span text:style-name="T207">Given </text:span><text:span text:style-name="T15">M</text:span><text:span text:style-name="T207"> the cardinality of the melody </text:span><text:span text:style-name="T15">APD</text:span><text:span text:style-name="T207"> set, and </text:span><text:span text:style-name="T15">V</text:span><text:span text:style-name="T207"> a 1-dimensional array of length </text:span><text:span text:style-name="T15">M</text:span><text:span text:style-name="T207">, <text:s/></text:span><text:span text:style-name="T209">let </text:span><text:span text:style-name="T207">members of the </text:span><text:span text:style-name="T15">APD</text:span><text:span text:style-name="T207"> set </text:span><text:span text:style-name="T209">be stored </text:span><text:span text:style-name="T207">in some arbitrary, yet specified order</text:span><text:span text:style-name="T207"><text:note text:id="ftn3" text:note-class="footnote"><text:note-citation>3</text:note-citation><text:note-body><text:p text:style-name="P2"><text:span text:style-name="T210">In practice, we see no use for arbitrariness in the ordering of</text:span> these integers in the array V, <text:span text:style-name="T210">hence for </text:span><text:span text:style-name="T222">the sake of clarity</text:span> <text:span text:style-name="T20">w</text:span><text:span text:style-name="T21">e opt </text:span><text:span text:style-name="T22">for </text:span><text:span text:style-name="T21">having them </text:span><text:span text:style-name="T20">sorted </text:span><text:span text:style-name="T3">in increasing order</text:span>, <text:span text:style-name="T210">whereby V[1] </text:span><text:span text:style-name="T210"><draw:frame draw:style-name="fr1" draw:name="Object7" text:anchor-type="as-char" svg:y="-0.33cm" svg:width="1.087cm" svg:height="0.355cm" draw:z-index="6"><draw:object xlink:href="./Object 7" xlink:type="simple" xlink:show="embed" xlink:actuate="onLoad"/><draw:image xlink:href="./ObjectReplacements/Object 7" xlink:type="simple" xlink:show="embed" xlink:actuate="onLoad"/></draw:frame></text:span><text:s text:c="2"/><text:span text:style-name="T211">V[2] … </text:span><text:span text:style-name="T211"><draw:frame draw:style-name="fr1" draw:name="Object8" text:anchor-type="as-char" svg:y="-0.33cm" svg:width="1.087cm" svg:height="0.355cm" draw:z-index="7"><draw:object xlink:href="./Object 8" xlink:type="simple" xlink:show="embed" xlink:actuate="onLoad"/><draw:image xlink:href="./ObjectReplacements/Object 8" xlink:type="simple" xlink:show="embed" xlink:actuate="onLoad"/><svg:desc>formula</svg:desc></draw:frame></text:span><text:span text:style-name="T211"><text:s/>V[N].</text:span></text:p></text:note-body></text:note></text:span><text:span text:style-name="T207"> </text:span><text:span text:style-name="T209">in the array </text:span><text:span text:style-name="T16">V</text:span><text:span text:style-name="T207">.</text:span></text:p>
      <text:p text:style-name="P30"><text:span text:style-name="T17">Concrete example</text:span><text:span text:style-name="T17"><text:note text:id="ftn4" text:note-class="footnote"><text:note-citation>4</text:note-citation><text:note-body><text:p text:style-name="Footnote">Note that <text:span text:style-name="T215">length(V) = 7 = M</text:span><text:span text:style-name="T214"> </text:span><text:s/>as it should be!</text:p></text:note-body></text:note></text:span><text:span text:style-name="T212">: </text:span><text:span text:style-name="T17">APD</text:span><text:span text:style-name="T212">=</text:span><text:span text:style-name="T17">{</text:span><text:span text:style-name="T212">-3, -2, -1, 0, 1, 2, 3</text:span><text:span text:style-name="T17">}</text:span><text:span text:style-name="T212">; </text:span><text:span text:style-name="T17">M</text:span><text:span text:style-name="T212">=7; </text:span><text:span text:style-name="T17">V</text:span><text:span text:style-name="T212"> = </text:span><text:span text:style-name="T17">[</text:span><text:span text:style-name="T212">-3, -2, -1, 0, 1, 2, 3</text:span><text:span text:style-name="T17">]</text:span><text:span text:style-name="T212">; </text:span><text:span text:style-name="T17">N</text:span><text:span text:style-name="T212">=</text:span><text:span text:style-name="T213">5.</text:span><text:span text:style-name="T212"> <text:s text:c="2"/></text:span><text:span text:style-name="T207"><text:s/></text:span><text:s text:c="3"/></text:p>
      <text:p text:style-name="P20"><text:s/><text:span text:style-name="T216">A </text:span><text:span text:style-name="T26">representative</text:span><text:span text:style-name="T216"> </text:span><text:span text:style-name="T18">R</text:span><text:span text:style-name="T216"> of a melody class fitting the above specification could be identified by a sequence of </text:span><text:span text:style-name="T17">N</text:span><text:span text:style-name="T212">=</text:span>5 <text:span text:style-name="T216">values taken from the 1-dimensional array </text:span><text:span text:style-name="T18">V</text:span><text:span text:style-name="T216">, like for exmple: </text:span></text:p>
      <text:p text:style-name="P21"><text:span text:style-name="T18">R</text:span><text:span text:style-name="T216"> = [2, -1, 0, 1, </text:span><text:span text:style-name="T219"><text:s/>-</text:span><text:span text:style-name="T228">3</text:span><text:span text:style-name="T216">]</text:span> <text:s/><text:span text:style-name="T216">(</text:span><text:span text:style-name="T220">where</text:span><text:span text:style-name="T216"> each element i</text:span><text:span text:style-name="T220">s</text:span><text:span text:style-name="T216"> a member of the APD set). An equivalent, </text:span><text:span text:style-name="T40">more convenient way</text:span><text:span text:style-name="T216"> to represent the same representative </text:span><text:span text:style-name="T87">R’ </text:span><text:span text:style-name="T216">of </text:span><text:span text:style-name="T220">a</text:span><text:span text:style-name="T216"> melody class is to replace each value in </text:span><text:span text:style-name="T18">R</text:span><text:span text:style-name="T216"> by the corresponding </text:span><text:span text:style-name="T18">offset</text:span><text:span text:style-name="T216"> </text:span><text:span text:style-name="T217">of that value </text:span><text:span text:style-name="T216">in the array </text:span><text:span text:style-name="T18">V </text:span><text:span text:style-name="T189">(of length</text:span><text:span text:style-name="T19"> M</text:span><text:span text:style-name="T189">)</text:span><text:span text:style-name="T216"> whereby, </text:span><text:span text:style-name="T221">in this example,</text:span></text:p>
      <text:p text:style-name="P22"><text:span text:style-name="T87">R</text:span><text:span text:style-name="T96">*</text:span><text:span text:style-name="T118"> = [5, </text:span><text:span text:style-name="T119">2</text:span><text:span text:style-name="T118">, </text:span><text:span text:style-name="T119">3</text:span><text:span text:style-name="T118">, </text:span><text:span text:style-name="T119">4</text:span><text:span text:style-name="T118">, <text:s/></text:span><text:span text:style-name="T158">0</text:span><text:span text:style-name="T118">]. <text:s text:c="2"/>Defined in this way, </text:span><text:span text:style-name="T88">R</text:span><text:span text:style-name="T96">*</text:span><text:span text:style-name="T120"> </text:span><text:span text:style-name="T118">does not depend directly on the actual APD values.</text:span><text:span text:style-name="T120"> <text:s/></text:span><text:span text:style-name="T118"><text:s/></text:span></text:p>
      <text:p text:style-name="P32"><text:soft-page-break/><text:span text:style-name="T217">One </text:span><text:span text:style-name="T3">key observation</text:span> <text:span text:style-name="T217">about the elements of the above array </text:span><text:span text:style-name="T87">R’</text:span><text:span text:style-name="T118"> </text:span><text:span text:style-name="T121">is that the sequence of its elements can be interpreted as the </text:span><text:span text:style-name="T61">representation of an integer number</text:span><text:span text:style-name="T121"> in </text:span><text:span text:style-name="T61">base</text:span><text:span text:style-name="T121"> </text:span><text:span text:style-name="T92">M</text:span><text:span text:style-name="T123">,</text:span><text:span text:style-name="T89"> </text:span><text:span text:style-name="T123">were </text:span><text:span text:style-name="T92">M</text:span><text:span text:style-name="T123"> = length(</text:span><text:span text:style-name="T89">V</text:span><text:span text:style-name="T123">) is the cardinality of the </text:span><text:span text:style-name="T89">APD</text:span><text:span text:style-name="T123"> set. </text:span><text:span text:style-name="T126">T</text:span><text:span text:style-name="T123">he whole sequence </text:span><text:span text:style-name="T128">(hence the corresponding </text:span><text:span text:style-name="T60">melody class</text:span><text:span text:style-name="T128">) </text:span><text:span text:style-name="T123">can </text:span><text:span text:style-name="T126">thus </text:span><text:span text:style-name="T123">be </text:span><text:span text:style-name="T126">uniquely identified by </text:span><text:span text:style-name="T128">that</text:span><text:span text:style-name="T123"> integer value, </text:span><text:span text:style-name="T128">that we denote as</text:span><text:span text:style-name="T123"> </text:span><text:span text:style-name="T93">I</text:span><text:span text:style-name="T128">(</text:span><text:span text:style-name="T93">M</text:span><text:span text:style-name="T128">). <text:s/></text:span></text:p>
      <text:p text:style-name="P33"><text:span text:style-name="T128">B</text:span><text:span text:style-name="T122">uilding on the above example, the sequence </text:span><text:span text:style-name="T87">R</text:span><text:span text:style-name="T96">*</text:span><text:span text:style-name="T135"> = [5, </text:span><text:span text:style-name="T148">2</text:span><text:span text:style-name="T135">, </text:span><text:span text:style-name="T148">3</text:span><text:span text:style-name="T135">, </text:span><text:span text:style-name="T148">4</text:span><text:span text:style-name="T135">, <text:s/></text:span><text:span text:style-name="T149">0</text:span><text:span text:style-name="T135">] </text:span><text:span text:style-name="T122">is interpreted as representing <text:s/></text:span></text:p>
      <text:p text:style-name="P32"><text:span text:style-name="T102">I(7) </text:span><text:span text:style-name="T150">= </text:span><text:span text:style-name="T102">5</text:span><text:span text:style-name="T103">*</text:span><text:span text:style-name="T150">7</text:span><text:span text:style-name="T171">0</text:span><text:span text:style-name="T150"> + </text:span><text:span text:style-name="T102">2</text:span><text:span text:style-name="T151">*</text:span><text:span text:style-name="T150">7</text:span><text:span text:style-name="T172">1</text:span><text:span text:style-name="T150"> + </text:span><text:span text:style-name="T102">3</text:span><text:span text:style-name="T151">*</text:span><text:span text:style-name="T150">7</text:span><text:span text:style-name="T172">2</text:span><text:span text:style-name="T150"> + </text:span><text:span text:style-name="T102">4</text:span><text:span text:style-name="T151">*</text:span><text:span text:style-name="T150">7</text:span><text:span text:style-name="T172">3</text:span><text:span text:style-name="T150"> + </text:span><text:span text:style-name="T102">0</text:span><text:span text:style-name="T151">*</text:span><text:span text:style-name="T150">7</text:span><text:span text:style-name="T172">4</text:span><text:span text:style-name="T174"> </text:span><text:span text:style-name="T150">= </text:span><text:span text:style-name="T102">5</text:span><text:span text:style-name="T150"> + </text:span><text:span text:style-name="T102">2</text:span><text:span text:style-name="T151">*</text:span><text:span text:style-name="T78">7</text:span><text:span text:style-name="T150"> + </text:span><text:span text:style-name="T102">3</text:span><text:span text:style-name="T151">*</text:span><text:span text:style-name="T78">49</text:span><text:span text:style-name="T150"> + </text:span><text:span text:style-name="T102">4</text:span><text:span text:style-name="T151">*</text:span><text:span text:style-name="T78">343</text:span><text:span text:style-name="T150"> + </text:span><text:span text:style-name="T102">0</text:span><text:span text:style-name="T151">*</text:span><text:span text:style-name="T78">2401</text:span><text:span text:style-name="T150"> = </text:span><text:span text:style-name="T104">3939</text:span><text:span text:style-name="T150"> <text:s text:c="2"/></text:span></text:p>
      <text:p text:style-name="P32"><text:span text:style-name="T128">B</text:span><text:span text:style-name="T126">y </text:span><text:span text:style-name="T73">decoding the individual digits</text:span><text:span text:style-name="T126"> representing that number </text:span><text:span text:style-name="T123"><text:s/>in base </text:span><text:span text:style-name="T92">M</text:span><text:span text:style-name="T123">, </text:span><text:span text:style-name="T127">one immediately recovers the vector </text:span><text:span text:style-name="T123">uniquely associated to that particular sequence of </text:span><text:span text:style-name="T89">APD</text:span><text:span text:style-name="T123">’s, </text:span><text:span text:style-name="T152">namely</text:span><text:span text:style-name="T123"> : </text:span><text:span text:style-name="T152">[5, 2, 3, 4, 0].</text:span><text:span text:style-name="T123"> </text:span></text:p>
      <text:p text:style-name="P27"><text:span text:style-name="T122">Another </text:span><text:span text:style-name="T79">key observation</text:span><text:span text:style-name="T122"> is that </text:span><text:span text:style-name="T129">a</text:span><text:span text:style-name="T131"> </text:span><text:span text:style-name="T62">k</text:span><text:span text:style-name="T131">-steps</text:span><text:span text:style-name="T129"> </text:span><text:span text:style-name="T75">rotation</text:span><text:span text:style-name="T124"> of th</text:span><text:span text:style-name="T131">e</text:span><text:span text:style-name="T124"> sequence of elements </text:span><text:span text:style-name="T131">in the vector </text:span><text:span text:style-name="T94">V</text:span><text:span text:style-name="T131"> </text:span><text:span text:style-name="T133">does not necessarily </text:span><text:span text:style-name="T124">produce a distinct integer value corresponding to the </text:span><text:span text:style-name="T59">same melody class</text:span><text:span text:style-name="T124">. </text:span><text:span text:style-name="T138">Indeed, the </text:span><text:span text:style-name="T63">cardinality</text:span><text:span text:style-name="T130"> of </text:span><text:span text:style-name="T132">the set </text:span><text:span text:style-name="T64">of all possible rotations of a melody class</text:span><text:span text:style-name="T132"> very much </text:span><text:span text:style-name="T64">depends on </text:span><text:span text:style-name="T65">the</text:span><text:span text:style-name="T133"> </text:span><text:span text:style-name="T65">structure</text:span><text:span text:style-name="T133"> of </text:span><text:span text:style-name="T130">the melody. </text:span><text:span text:style-name="T133">Here we give two examples </text:span><text:span text:style-name="T134">with </text:span><text:span text:style-name="T96">M</text:span><text:span text:style-name="T134">=7 and </text:span><text:span text:style-name="T96">N</text:span><text:span text:style-name="T134">=5</text:span></text:p>
      <text:list text:style-name="List_20_1">
        <text:list-item>
          <text:p text:style-name="P39"><text:span text:style-name="T133">Example </text:span><text:span text:style-name="T95">1</text:span><text:span text:style-name="T133">: <text:s/></text:span><text:span text:style-name="T87">R</text:span><text:span text:style-name="T96">*</text:span><text:span text:style-name="T135"> = [</text:span><text:span text:style-name="T134">2, 3, 4, 5, 6</text:span><text:span text:style-name="T135">] : <text:s/></text:span><text:span text:style-name="T62">k</text:span><text:span text:style-name="T131">-steps </text:span><text:span text:style-name="T137">rotations with </text:span><text:span text:style-name="T62">k</text:span><text:span text:style-name="T137"> in </text:span><text:span text:style-name="T97">{</text:span><text:span text:style-name="T137">1, 2, 3, 4</text:span><text:span text:style-name="T97">}</text:span><text:span text:style-name="T137"> yield distinct melodies:</text:span></text:p>
          <text:list>
            <text:list-item>
              <text:list>
                <text:list-item>
                  <text:p text:style-name="P39"><text:span text:style-name="T137"><text:s text:c="2"/></text:span><text:span text:style-name="T135"><text:s/>[</text:span><text:span text:style-name="T134">3, 4, 5, 6, </text:span><text:span text:style-name="T137">2</text:span><text:span text:style-name="T135">]; <text:s text:c="3"/>[</text:span><text:span text:style-name="T134">4, 5, 6, </text:span><text:span text:style-name="T137">2, 3</text:span><text:span text:style-name="T135">]; <text:s text:c="3"/>[</text:span><text:span text:style-name="T134">5, 6, </text:span><text:span text:style-name="T137">2, 3, 4</text:span><text:span text:style-name="T135">]; <text:s text:c="3"/>[</text:span><text:span text:style-name="T134">6, </text:span><text:span text:style-name="T137">2, 3, 4, 5</text:span><text:span text:style-name="T135">].</text:span></text:p>
                </text:list-item>
              </text:list>
            </text:list-item>
          </text:list>
        </text:list-item>
      </text:list>
      <text:p text:style-name="P31"><text:span text:style-name="T135"><text:s text:c="3"/></text:span><text:span text:style-name="T153">Note that </text:span><text:span text:style-name="T74">each one of the above rotated melodies is represented by a distinct integer number</text:span><text:span text:style-name="T153">.</text:span></text:p>
      <text:list text:continue-numbering="true" text:style-name="List_20_1">
        <text:list-item>
          <text:p text:style-name="P40"><text:span text:style-name="T133">Example </text:span><text:span text:style-name="T95">2</text:span><text:span text:style-name="T133">: <text:s/></text:span><text:span text:style-name="T87">R</text:span><text:span text:style-name="T96">*</text:span><text:span text:style-name="T135"> = [</text:span><text:span text:style-name="T134">2, </text:span><text:span text:style-name="T136">2</text:span><text:span text:style-name="T134">, </text:span><text:span text:style-name="T136">2</text:span><text:span text:style-name="T134">, </text:span><text:span text:style-name="T136">2</text:span><text:span text:style-name="T134">, </text:span><text:span text:style-name="T136">2</text:span><text:span text:style-name="T135">] : <text:s/></text:span><text:span text:style-name="T136">This melody structure is clearly </text:span><text:span text:style-name="T66">rotation invariant</text:span><text:span text:style-name="T136">, hence the associate melody class includes </text:span><text:span text:style-name="T137">only </text:span><text:span text:style-name="T67">one </text:span><text:span text:style-name="T66">member</text:span><text:span text:style-name="T136">, </text:span><text:span text:style-name="T154">represented by the number </text:span><text:span text:style-name="T105">2801</text:span><text:span text:style-name="T155">.</text:span><text:span text:style-name="T154"> </text:span><text:span text:style-name="T135"><text:s text:c="5"/></text:span></text:p>
        </text:list-item>
      </text:list>
      <text:p text:style-name="P28"><text:span text:style-name="T141">In the following, we take </text:span><text:span text:style-name="T124">the </text:span><text:span text:style-name="T90">minimum</text:span><text:span text:style-name="T90"><text:note text:id="ftn5" text:note-class="footnote"><text:note-citation>5</text:note-citation><text:note-body><text:p text:style-name="P23">The maximum could do as well as the minimum, of course. However <text:span text:style-name="T3">for clarity we stick with the minimum</text:span>.</text:p></text:note-body></text:note></text:span><text:span text:style-name="T124"> </text:span><text:span text:style-name="T139">within the set of </text:span><text:span text:style-name="T124">integers </text:span><text:span text:style-name="T125">associated to rotation</text:span><text:span text:style-name="T140">s</text:span><text:span text:style-name="T125"> of a </text:span><text:span text:style-name="T91">melody</text:span><text:span text:style-name="T125"> </text:span><text:span text:style-name="T141">as </text:span><text:span text:style-name="T124">as a convenient (</text:span><text:span text:style-name="T59">unique</text:span><text:span text:style-name="T124">) identifier o</text:span><text:span text:style-name="T125">f</text:span><text:span text:style-name="T124"> th</text:span><text:span text:style-name="T132">e </text:span><text:span text:style-name="T140">corresponding </text:span><text:span text:style-name="T132">melody </text:span><text:span text:style-name="T98">class</text:span><text:span text:style-name="T132">. </text:span></text:p>
      <text:h text:style-name="P38" text:outline-level="2">Sampling methods for detecting nice melodies in the vast sea</text:h>
      <text:p text:style-name="P29"><text:span text:style-name="T142">Our next goal is to device a strategy </text:span><text:span text:style-name="T140">for sampling the potentially vast sea of melodies </text:span><text:span text:style-name="T142">in search of the most beautiful </text:span><text:span text:style-name="T143">ones</text:span><text:span text:style-name="T142"> </text:span><text:span text:style-name="T140">associated with a given pair (</text:span><text:span text:style-name="T99">M</text:span><text:span text:style-name="T140">, </text:span><text:span text:style-name="T99">N</text:span><text:span text:style-name="T140">) of parameters. <text:s/></text:span><text:span text:style-name="T143">In the previous section we have </text:span><text:span text:style-name="T144">learned </text:span><text:span text:style-name="T72">t</text:span><text:span text:style-name="T71">wo facts</text:span><text:span text:style-name="T144">: </text:span></text:p>
      <text:list text:style-name="Numbering_20_abc">
        <text:list-item>
          <text:p text:style-name="P41"><text:span text:style-name="T69">M</text:span><text:span text:style-name="T68">elody structure</text:span><text:span text:style-name="T143">, </text:span><text:span text:style-name="T144">defined </text:span><text:span text:style-name="T143">by the </text:span><text:span text:style-name="T87">R</text:span><text:span text:style-name="T96">* </text:span><text:span text:style-name="T143">vector</text:span><text:span text:style-name="T96">,</text:span><text:span text:style-name="T143"> determines the </text:span><text:span text:style-name="T68">cardinality</text:span><text:span text:style-name="T143"> of </text:span><text:span text:style-name="T147">a</text:span><text:span text:style-name="T143"> </text:span><text:span text:style-name="T68">melody class</text:span><text:span text:style-name="T143">;</text:span></text:p>
        </text:list-item>
        <text:list-item>
          <text:p text:style-name="P42"><text:span text:style-name="T146">T</text:span><text:span text:style-name="T145">here </text:span><text:span text:style-name="T146">is </text:span><text:span text:style-name="T145">a </text:span><text:span text:style-name="T70">one-to-one mapping</text:span><text:span text:style-name="T145"> between </text:span><text:span text:style-name="T77">melody classes</text:span><text:span text:style-name="T147"> and </text:span><text:span text:style-name="T77">positive </text:span><text:span text:style-name="T76">integers </text:span><text:span text:style-name="T77">(</text:span><text:span text:style-name="T157">plus</text:span><text:span text:style-name="T77"> zero) </text:span><text:span text:style-name="T147">whose </text:span><text:span text:style-name="T71">representation in base</text:span><text:span text:style-name="T101"> M</text:span><text:span text:style-name="T147"> requires </text:span><text:span text:style-name="T71">up to</text:span><text:span text:style-name="T147"> </text:span><text:span text:style-name="T101">N</text:span><text:span text:style-name="T147"> digits. </text:span><text:span text:style-name="T145"><text:s/></text:span><text:span text:style-name="T143"><text:s text:c="4"/></text:span><text:span text:style-name="T140"><text:s text:c="3"/></text:span><text:span text:style-name="T124"><text:s text:c="6"/></text:span><text:span text:style-name="T123"><text:s/></text:span></text:p>
        </text:list-item>
      </text:list>
      <text:p text:style-name="P25"><text:span text:style-name="T223">Fact </text:span><text:span text:style-name="T23">b.</text:span><text:span text:style-name="T223"> suggests that a </text:span><text:span text:style-name="T41">uniform random sampling</text:span><text:span text:style-name="T223"> of integers in the range [</text:span><text:span text:style-name="T23">0</text:span><text:span text:style-name="T223">, </text:span><text:span text:style-name="T23">M</text:span><text:span text:style-name="T175">N</text:span><text:span text:style-name="T229"> </text:span><text:span text:style-name="T230">- </text:span><text:span text:style-name="T231">1</text:span><text:span text:style-name="T223">] would implement an </text:span><text:span text:style-name="T41">unbiased exploration</text:span><text:span text:style-name="T223"> of the set of </text:span><text:span text:style-name="T41">melody classes</text:span><text:span text:style-name="T223">. </text:span><text:span text:style-name="T224">In details: once an integer </text:span><text:span text:style-name="T42">n</text:span><text:span text:style-name="T224"> is sampled, one first determine the </text:span><text:span text:style-name="T24">melody class</text:span><text:span text:style-name="T224"> which that integer is a member </text:span><text:span text:style-name="T232">of</text:span><text:span text:style-name="T224">. The class itself is identified by the minimum integer which is obtained by cyclic rotations of the digits of the integer </text:span><text:span text:style-name="T42">n</text:span><text:span text:style-name="T224"> in base </text:span><text:span text:style-name="T24">M</text:span><text:span text:style-name="T224">.</text:span></text:p>
      <text:p text:style-name="P26">By repeating such uniform random sampling of melody classes, one tries to correlate the number of <text:s/>occurrences of <text:span text:style-name="T225">a </text:span>melody class with <text:span text:style-name="T236">some </text:span><text:span text:style-name="T225">distinctive feature of </text:span><text:span text:style-name="T237">classes</text:span><text:span text:style-name="T225">.</text:span> <text:s text:c="2"/></text:p>
      <text:p text:style-name="P25"><text:span text:style-name="T226">Early experiments </text:span><text:span text:style-name="T235">appear </text:span><text:span text:style-name="T226">to show a </text:span><text:span text:style-name="T233">marked</text:span><text:span text:style-name="T226"> </text:span><text:span text:style-name="T43">disuniformity of hits </text:span><text:span text:style-name="T45">density</text:span><text:span text:style-name="T43"> across melody classes</text:span><text:span text:style-name="T226">, </text:span><text:span text:style-name="T233">suggesting to investigate </text:span><text:span text:style-name="T235">a </text:span><text:span text:style-name="T233">possible </text:span><text:span text:style-name="T43">correlation</text:span><text:span text:style-name="T226"> between </text:span><text:span text:style-name="T45">hits density </text:span><text:span text:style-name="T233">and </text:span><text:span text:style-name="T234">a </text:span><text:span text:style-name="T227">quantifiable propert</text:span><text:span text:style-name="T234">y</text:span><text:span text:style-name="T227"> of classes, </text:span><text:span text:style-name="T239">like </text:span><text:span text:style-name="T44">cardinality</text:span><text:span text:style-name="T227">.</text:span><text:span text:style-name="T226"> </text:span><text:span text:style-name="T223"><text:s/></text:span></text:p>
      <text:p text:style-name="P11"><text:soft-page-break/><text:span text:style-name="T53"/></text:p>
      <text:p text:style-name="Subtitle"/>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M Mono Slanted 10" svg:font-family="'LM Mono Slanted 10'"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05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7-09T16:58:55.834373324</meta:creation-date>
    <dc:date>2026-07-11T10:22:03.484633982</dc:date>
    <meta:editing-duration>PT21H8M18S</meta:editing-duration>
    <meta:editing-cycles>154</meta:editing-cycles>
    <meta:generator>LibreOffice/24.2.7.2$Linux_X86_64 LibreOffice_project/420$Build-2</meta:generator>
    <meta:print-date>2026-07-11T08:40:00.178472315</meta:print-date>
    <meta:printed-by>PDF files</meta:printed-by>
    <meta:document-statistic meta:table-count="0" meta:image-count="0" meta:object-count="8" meta:page-count="5" meta:paragraph-count="47" meta:word-count="1606" meta:character-count="9021" meta:non-whitespace-character-count="7340"/>
  </office:meta>
</office:document-meta>
</file>

<file path=Object 1/content.xml><?xml version="1.0" encoding="utf-8"?>
<math xmlns="http://www.w3.org/1998/Math/MathML" display="block">
  <semantics>
    <mi>ν</mi>
    <annotation encoding="StarMath 5.0">%nu </annotation>
  </semantics>
</math>
</file>

<file path=Object 2/content.xml><?xml version="1.0" encoding="utf-8"?>
<math xmlns="http://www.w3.org/1998/Math/MathML" display="block">
  <semantics>
    <mi>η</mi>
    <annotation encoding="StarMath 5.0">%eta </annotation>
  </semantics>
</math>
</file>

<file path=Object 3/content.xml><?xml version="1.0" encoding="utf-8"?>
<math xmlns="http://www.w3.org/1998/Math/MathML" display="block">
  <semantics>
    <mi>ν</mi>
    <annotation encoding="StarMath 5.0">%nu </annotation>
  </semantics>
</math>
</file>

<file path=Object 4/content.xml><?xml version="1.0" encoding="utf-8"?>
<math xmlns="http://www.w3.org/1998/Math/MathML" display="block">
  <semantics>
    <mi>η</mi>
    <annotation encoding="StarMath 5.0">%eta </annotation>
  </semantics>
</math>
</file>

<file path=Object 5/content.xml><?xml version="1.0" encoding="utf-8"?>
<math xmlns="http://www.w3.org/1998/Math/MathML" display="block">
  <semantics>
    <mi>ν</mi>
    <annotation encoding="StarMath 5.0">%nu </annotation>
  </semantics>
</math>
</file>

<file path=Object 6/content.xml><?xml version="1.0" encoding="utf-8"?>
<math xmlns="http://www.w3.org/1998/Math/MathML" display="block">
  <semantics>
    <mi>η</mi>
    <annotation encoding="StarMath 5.0">%eta </annotation>
  </semantics>
</math>
</file>

<file path=Object 7/content.xml><?xml version="1.0" encoding="utf-8"?>
<math xmlns="http://www.w3.org/1998/Math/MathML" display="block">
  <semantics>
    <mrow>
      <mi mathvariant="normal">❑</mi>
      <mo stretchy="false">≤</mo>
      <mi mathvariant="normal">❑</mi>
    </mrow>
    <annotation encoding="StarMath 5.0">&lt;?&gt; &lt;= &lt;?&gt; </annotation>
  </semantics>
</math>
</file>

<file path=Object 8/content.xml><?xml version="1.0" encoding="utf-8"?>
<math xmlns="http://www.w3.org/1998/Math/MathML" display="block">
  <semantics>
    <mrow>
      <mi mathvariant="normal">❑</mi>
      <mo stretchy="false">≤</mo>
      <mi mathvariant="normal">❑</mi>
    </mrow>
    <annotation encoding="StarMath 5.0">&lt;?&gt; &lt;= &lt;?&gt; </annotation>
  </semantics>
</math>
</file>